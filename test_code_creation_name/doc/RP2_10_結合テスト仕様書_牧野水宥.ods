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automatic-styles>
    <style:style style:name="co1" style:family="table-column">
      <style:table-column-properties fo:break-before="auto" style:column-width="2.429cm"/>
    </style:style>
    <style:style style:name="co2" style:family="table-column">
      <style:table-column-properties fo:break-before="auto" style:column-width="5.054cm"/>
    </style:style>
    <style:style style:name="co3" style:family="table-column">
      <style:table-column-properties fo:break-before="auto" style:column-width="13.952cm"/>
    </style:style>
    <style:style style:name="co4" style:family="table-column">
      <style:table-column-properties fo:break-before="auto" style:column-width="1.939cm"/>
    </style:style>
    <style:style style:name="co5" style:family="table-column">
      <style:table-column-properties fo:break-before="auto" style:column-width="2.722cm"/>
    </style:style>
    <style:style style:name="co6" style:family="table-column">
      <style:table-column-properties fo:break-before="auto" style:column-width="0.527cm"/>
    </style:style>
    <style:style style:name="co7" style:family="table-column">
      <style:table-column-properties fo:break-before="auto" style:column-width="2.212cm"/>
    </style:style>
    <style:style style:name="ro1" style:family="table-row">
      <style:table-row-properties style:row-height="0.517cm" fo:break-before="auto" style:use-optimal-row-height="true"/>
    </style:style>
    <style:style style:name="ro2" style:family="table-row">
      <style:table-row-properties style:row-height="0.847cm" fo:break-before="auto" style:use-optimal-row-height="false"/>
    </style:style>
    <style:style style:name="ro3" style:family="table-row">
      <style:table-row-properties style:row-height="1.402cm" fo:break-before="auto" style:use-optimal-row-height="true"/>
    </style:style>
    <style:style style:name="ro4" style:family="table-row">
      <style:table-row-properties style:row-height="1.099cm" fo:break-before="auto" style:use-optimal-row-height="true"/>
    </style:style>
    <style:style style:name="ro5" style:family="table-row">
      <style:table-row-properties style:row-height="1.207cm" fo:break-before="auto" style:use-optimal-row-height="false"/>
    </style:style>
    <style:style style:name="ro6" style:family="table-row">
      <style:table-row-properties style:row-height="0.764cm" fo:break-before="auto" style:use-optimal-row-height="true"/>
    </style:style>
    <style:style style:name="ro7" style:family="table-row">
      <style:table-row-properties style:row-height="0.762cm" fo:break-before="auto" style:use-optimal-row-height="true"/>
    </style:style>
    <style:style style:name="ro8" style:family="table-row">
      <style:table-row-properties style:row-height="0.758cm" fo:break-before="auto" style:use-optimal-row-height="true"/>
    </style:style>
    <style:style style:name="ro9" style:family="table-row">
      <style:table-row-properties style:row-height="0.6cm" fo:break-before="auto" style:use-optimal-row-height="true"/>
    </style:style>
    <style:style style:name="ro10" style:family="table-row">
      <style:table-row-properties style:row-height="1.104cm" fo:break-before="auto" style:use-optimal-row-height="true"/>
    </style:style>
    <style:style style:name="ro11" style:family="table-row">
      <style:table-row-properties style:row-height="2.154cm" fo:break-before="auto" style:use-optimal-row-height="false"/>
    </style:style>
    <style:style style:name="ro12" style:family="table-row">
      <style:table-row-properties style:row-height="2.879cm" fo:break-before="auto" style:use-optimal-row-height="false"/>
    </style:style>
    <style:style style:name="ro13" style:family="table-row">
      <style:table-row-properties style:row-height="3.048cm" fo:break-before="auto" style:use-optimal-row-height="false"/>
    </style:style>
    <style:style style:name="ro14" style:family="table-row">
      <style:table-row-properties style:row-height="2.582cm" fo:break-before="auto" style:use-optimal-row-height="false"/>
    </style:style>
    <style:style style:name="ro15" style:family="table-row">
      <style:table-row-properties style:row-height="3.45cm" fo:break-before="auto" style:use-optimal-row-height="false"/>
    </style:style>
    <style:style style:name="ro16" style:family="table-row">
      <style:table-row-properties style:row-height="4.678cm" fo:break-before="auto" style:use-optimal-row-height="false"/>
    </style:style>
    <style:style style:name="ro17" style:family="table-row">
      <style:table-row-properties style:row-height="2.477cm" fo:break-before="auto" style:use-optimal-row-height="false"/>
    </style:style>
    <style:style style:name="ro18" style:family="table-row">
      <style:table-row-properties style:row-height="2.54cm" fo:break-before="auto" style:use-optimal-row-height="false"/>
    </style:style>
    <style:style style:name="ro19" style:family="table-row">
      <style:table-row-properties style:row-height="5.186cm" fo:break-before="auto" style:use-optimal-row-height="false"/>
    </style:style>
    <style:style style:name="ro20" style:family="table-row">
      <style:table-row-properties style:row-height="3.958cm" fo:break-before="auto" style:use-optimal-row-height="false"/>
    </style:style>
    <style:style style:name="ro21" style:family="table-row">
      <style:table-row-properties style:row-height="4.297cm" fo:break-before="auto" style:use-optimal-row-height="false"/>
    </style:style>
    <style:style style:name="ro22" style:family="table-row">
      <style:table-row-properties style:row-height="4.276cm" fo:break-before="auto" style:use-optimal-row-height="false"/>
    </style:style>
    <style:style style:name="ro23" style:family="table-row">
      <style:table-row-properties style:row-height="3.041cm" fo:break-before="auto" style:use-optimal-row-height="false"/>
    </style:style>
    <style:style style:name="ro24" style:family="table-row">
      <style:table-row-properties style:row-height="0.725cm" fo:break-before="auto" style:use-optimal-row-height="false"/>
    </style:style>
    <style:style style:name="ro25" style:family="table-row">
      <style:table-row-properties style:row-height="2.039cm" fo:break-before="auto" style:use-optimal-row-height="true"/>
    </style:style>
    <style:style style:name="ro26" style:family="table-row">
      <style:table-row-properties style:row-height="2.034cm" fo:break-before="auto" style:use-optimal-row-height="true"/>
    </style:style>
    <style:style style:name="ro27" style:family="table-row">
      <style:table-row-properties style:row-height="1.074cm" fo:break-before="auto" style:use-optimal-row-height="true"/>
    </style:style>
    <style:style style:name="ro28" style:family="table-row">
      <style:table-row-properties style:row-height="2.03cm" fo:break-before="auto" style:use-optimal-row-height="true"/>
    </style:style>
    <style:style style:name="ro29" style:family="table-row">
      <style:table-row-properties style:row-height="1.711cm" fo:break-before="auto" style:use-optimal-row-height="true"/>
    </style:style>
    <style:style style:name="ro30" style:family="table-row">
      <style:table-row-properties style:row-height="1.078cm" fo:break-before="auto" style:use-optimal-row-height="true"/>
    </style:style>
    <style:style style:name="ro31" style:family="table-row">
      <style:table-row-properties style:row-height="1.72cm" fo:break-before="auto" style:use-optimal-row-height="true"/>
    </style:style>
    <style:style style:name="ro32" style:family="table-row">
      <style:table-row-properties style:row-height="1.083cm" fo:break-before="auto" style:use-optimal-row-height="true"/>
    </style:style>
    <style:style style:name="ro33" style:family="table-row">
      <style:table-row-properties style:row-height="2.358cm" fo:break-before="auto" style:use-optimal-row-height="true"/>
    </style:style>
    <style:style style:name="ro34" style:family="table-row">
      <style:table-row-properties style:row-height="2.678cm" fo:break-before="auto" style:use-optimal-row-height="true"/>
    </style:style>
    <style:style style:name="ro35" style:family="table-row">
      <style:table-row-properties style:row-height="2.103cm" fo:break-before="auto" style:use-optimal-row-height="true"/>
    </style:style>
    <style:style style:name="ro36" style:family="table-row">
      <style:table-row-properties style:row-height="2.187cm" fo:break-before="auto" style:use-optimal-row-height="true"/>
    </style:style>
    <style:style style:name="ro37" style:family="table-row">
      <style:table-row-properties style:row-height="2.21cm" fo:break-before="auto" style:use-optimal-row-height="true"/>
    </style:style>
    <style:style style:name="ro38" style:family="table-row">
      <style:table-row-properties style:row-height="2.528cm" fo:break-before="auto" style:use-optimal-row-height="true"/>
    </style:style>
    <style:style style:name="ro39" style:family="table-row">
      <style:table-row-properties style:row-height="1.395cm" fo:break-before="auto" style:use-optimal-row-height="true"/>
    </style:style>
    <style:style style:name="ro40" style:family="table-row">
      <style:table-row-properties style:row-height="0.818cm" fo:break-before="auto" style:use-optimal-row-height="true"/>
    </style:style>
    <style:style style:name="ro41" style:family="table-row">
      <style:table-row-properties style:row-height="1.392cm" fo:break-before="auto" style:use-optimal-row-height="true"/>
    </style:style>
    <style:style style:name="ro42" style:family="table-row">
      <style:table-row-properties style:row-height="1.138cm" fo:break-before="auto" style:use-optimal-row-height="true"/>
    </style:style>
    <style:style style:name="ro43" style:family="table-row">
      <style:table-row-properties style:row-height="0.755cm" fo:break-before="auto" style:use-optimal-row-height="true"/>
    </style:style>
    <style:style style:name="ro44" style:family="table-row">
      <style:table-row-properties style:row-height="0.813cm" fo:break-before="auto" style:use-optimal-row-height="true"/>
    </style:style>
    <style:style style:name="ro45" style:family="table-row">
      <style:table-row-properties style:row-height="5.546cm" fo:break-before="auto" style:use-optimal-row-height="true"/>
    </style:style>
    <style:style style:name="ro46" style:family="table-row">
      <style:table-row-properties style:row-height="1.132cm" fo:break-before="auto" style:use-optimal-row-height="true"/>
    </style:style>
    <style:style style:name="ro47" style:family="table-row">
      <style:table-row-properties style:row-height="1.409cm" fo:break-before="auto" style:use-optimal-row-height="true"/>
    </style:style>
    <style:style style:name="ro48" style:family="table-row">
      <style:table-row-properties style:row-height="2.048cm" fo:break-before="auto" style:use-optimal-row-height="true"/>
    </style:style>
    <style:style style:name="ro49" style:family="table-row">
      <style:table-row-properties style:row-height="0.769cm" fo:break-before="auto" style:use-optimal-row-height="true"/>
    </style:style>
    <style:style style:name="ro50" style:family="table-row">
      <style:table-row-properties style:row-height="2.351cm" fo:break-before="auto" style:use-optimal-row-height="true"/>
    </style:style>
    <style:style style:name="ro51" style:family="table-row">
      <style:table-row-properties style:row-height="2.348cm" fo:break-before="auto" style:use-optimal-row-height="true"/>
    </style:style>
    <style:style style:name="ta1" style:family="table" style:master-page-name="PageStyle_5f_表紙">
      <style:table-properties table:display="true" style:writing-mode="lr-tb"/>
    </style:style>
    <style:style style:name="ta2" style:family="table" style:master-page-name="PageStyle_5f_ケース一覧">
      <style:table-properties table:display="true" style:writing-mode="lr-tb"/>
    </style:style>
    <style:style style:name="ta3" style:family="table" style:master-page-name="PageStyle_5f_ケース01">
      <style:table-properties table:display="true" style:writing-mode="lr-tb"/>
    </style:style>
    <style:style style:name="ta4" style:family="table" style:master-page-name="PageStyle_5f_ケース02">
      <style:table-properties table:display="true" style:writing-mode="lr-tb"/>
    </style:style>
    <style:style style:name="ta5" style:family="table" style:master-page-name="PageStyle_5f_ケース03">
      <style:table-properties table:display="true" style:writing-mode="lr-tb"/>
    </style:style>
    <style:style style:name="ta6" style:family="table" style:master-page-name="PageStyle_5f_ケース04">
      <style:table-properties table:display="true" style:writing-mode="lr-tb"/>
    </style:style>
    <style:style style:name="ta7" style:family="table" style:master-page-name="PageStyle_5f_ケース05">
      <style:table-properties table:display="true" style:writing-mode="lr-tb"/>
    </style:style>
    <style:style style:name="ta8" style:family="table" style:master-page-name="PageStyle_5f_ケース06">
      <style:table-properties table:display="true" style:writing-mode="lr-tb"/>
    </style:style>
    <style:style style:name="ta9" style:family="table" style:master-page-name="PageStyle_5f_ケース07">
      <style:table-properties table:display="true" style:writing-mode="lr-tb"/>
    </style:style>
    <style:style style:name="ta10" style:family="table" style:master-page-name="PageStyle_5f_ケース08">
      <style:table-properties table:display="true" style:writing-mode="lr-tb"/>
    </style:style>
    <style:style style:name="ta11" style:family="table" style:master-page-name="PageStyle_5f_ケース09">
      <style:table-properties table:display="true" style:writing-mode="lr-tb"/>
    </style:style>
    <style:style style:name="ta12" style:family="table" style:master-page-name="PageStyle_5f_ケース10">
      <style:table-properties table:display="true" style:writing-mode="lr-tb"/>
    </style:style>
    <style:style style:name="ta13" style:family="table" style:master-page-name="PageStyle_5f_ケース11">
      <style:table-properties table:display="true" style:writing-mode="lr-tb"/>
    </style:style>
    <style:style style:name="ta14" style:family="table" style:master-page-name="PageStyle_5f_ケース12">
      <style:table-properties table:display="true" style:writing-mode="lr-tb"/>
    </style:style>
    <style:style style:name="ta15" style:family="table" style:master-page-name="PageStyle_5f_ケース13">
      <style:table-properties table:display="true" style:writing-mode="lr-tb"/>
    </style:style>
    <style:style style:name="ta16" style:family="table" style:master-page-name="PageStyle_5f_ケース14">
      <style:table-properties table:display="true" style:writing-mode="lr-tb"/>
    </style:style>
    <style:style style:name="ta17" style:family="table" style:master-page-name="PageStyle_5f_ケース15">
      <style:table-properties table:display="true" style:writing-mode="lr-tb"/>
    </style:style>
    <style:style style:name="ta18" style:family="table" style:master-page-name="PageStyle_5f_ケース16">
      <style:table-properties table:display="true" style:writing-mode="lr-tb"/>
    </style:style>
    <style:style style:name="ta19" style:family="table" style:master-page-name="PageStyle_5f_ケース17">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67"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68" style:family="table-cell" style:parent-style-name="Excel_20_Built-in_20_Normal">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69"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24pt" fo:font-style="normal" fo:text-shadow="none" style:text-underline-style="none" fo:font-weight="normal" style:font-name-asian="Meiryo" style:font-size-asian="24pt" style:font-style-asian="normal" style:font-weight-asian="normal" style:font-size-complex="24pt" style:font-style-complex="normal" style:font-weight-complex="normal"/>
    </style:style>
    <style:style style:name="ce70"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1"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2" style:family="table-cell" style:parent-style-name="Excel_20_Built-in_20_Normal" style:data-style-name="N36">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3" style:family="table-cell" style:parent-style-name="Excel_20_Built-in_20_Normal">
      <style:table-cell-properties style:glyph-orientation-vertical="0"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8" style:family="table-cell" style:parent-style-name="Excel_20_Built-in_20_Normal">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5"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79"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81"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メイリオ" fo:font-size="12pt" fo:font-style="normal" fo:text-shadow="none" style:text-underline-style="none" fo:font-weight="bold" style:font-name-asian="メイリオ" style:font-size-asian="12pt" style:font-style-asian="normal" style:font-weight-asian="bold" style:font-size-complex="12pt" style:font-style-complex="normal" style:font-weight-complex="bold"/>
    </style:style>
    <style:style style:name="ce82"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3" style:family="table-cell" style:parent-style-name="標準_20_2_20_8" style:data-style-name="N157">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4"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5"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6"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tru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8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tru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2"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90"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1"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92"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9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9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9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98"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9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4.A1" xlink:type="simple"/>
        <loext:hyperlink xlink:href="#ケース04.A1" xlink:type="simple"/>
      </style:table-cell-properties>
      <style:paragraph-properties css3t:text-justify="auto" fo:margin-left="0cm" style:writing-mode="page"/>
    </style:style>
    <style:style style:name="ce10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5.A1" xlink:type="simple"/>
        <loext:hyperlink xlink:href="#ケース05.A1" xlink:type="simple"/>
      </style:table-cell-properties>
      <style:paragraph-properties css3t:text-justify="auto" fo:margin-left="0cm" style:writing-mode="page"/>
    </style:style>
    <style:style style:name="ce10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6.A1" xlink:type="simple"/>
        <loext:hyperlink xlink:href="#ケース06.A1" xlink:type="simple"/>
      </style:table-cell-properties>
      <style:paragraph-properties css3t:text-justify="auto" fo:margin-left="0cm" style:writing-mode="page"/>
    </style:style>
    <style:style style:name="ce10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7.A1" xlink:type="simple"/>
        <loext:hyperlink xlink:href="#ケース07.A1" xlink:type="simple"/>
      </style:table-cell-properties>
      <style:paragraph-properties css3t:text-justify="auto" fo:margin-left="0cm" style:writing-mode="page"/>
    </style:style>
    <style:style style:name="ce10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8.A1" xlink:type="simple"/>
        <loext:hyperlink xlink:href="#ケース08.A1" xlink:type="simple"/>
      </style:table-cell-properties>
      <style:paragraph-properties css3t:text-justify="auto" fo:margin-left="0cm" style:writing-mode="page"/>
    </style:style>
    <style:style style:name="ce10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9.A1" xlink:type="simple"/>
        <loext:hyperlink xlink:href="#ケース09.A1" xlink:type="simple"/>
      </style:table-cell-properties>
      <style:paragraph-properties css3t:text-justify="auto" fo:margin-left="0cm" style:writing-mode="page"/>
    </style:style>
    <style:style style:name="ce10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0.A1" xlink:type="simple"/>
        <loext:hyperlink xlink:href="#ケース10.A1" xlink:type="simple"/>
      </style:table-cell-properties>
      <style:paragraph-properties css3t:text-justify="auto" fo:margin-left="0cm" style:writing-mode="page"/>
    </style:style>
    <style:style style:name="ce10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1.A1" xlink:type="simple"/>
        <loext:hyperlink xlink:href="#ケース11.A1" xlink:type="simple"/>
      </style:table-cell-properties>
      <style:paragraph-properties css3t:text-justify="auto" fo:margin-left="0cm" style:writing-mode="page"/>
    </style:style>
    <style:style style:name="ce10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2.A1" xlink:type="simple"/>
        <loext:hyperlink xlink:href="#ケース12.A1" xlink:type="simple"/>
      </style:table-cell-properties>
      <style:paragraph-properties css3t:text-justify="auto" fo:margin-left="0cm" style:writing-mode="page"/>
    </style:style>
    <style:style style:name="ce10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3.A1" xlink:type="simple"/>
        <loext:hyperlink xlink:href="#ケース13.A1" xlink:type="simple"/>
      </style:table-cell-properties>
      <style:paragraph-properties css3t:text-justify="auto" fo:margin-left="0cm" style:writing-mode="page"/>
    </style:style>
    <style:style style:name="ce10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4.A1" xlink:type="simple"/>
        <loext:hyperlink xlink:href="#ケース14.A1" xlink:type="simple"/>
      </style:table-cell-properties>
      <style:paragraph-properties css3t:text-justify="auto" fo:margin-left="0cm" style:writing-mode="page"/>
    </style:style>
    <style:style style:name="ce11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5.A1" xlink:type="simple"/>
        <loext:hyperlink xlink:href="#ケース15.A1" xlink:type="simple"/>
      </style:table-cell-properties>
      <style:paragraph-properties css3t:text-justify="auto" fo:margin-left="0cm" style:writing-mode="page"/>
    </style:style>
    <style:style style:name="ce111"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12"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1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1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15"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1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1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51"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26"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27"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28"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29" style:family="table-cell" style:parent-style-name="Excel_20_Built-in_20_Normal">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0"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2" style:family="table-cell" style:parent-style-name="Excel_20_Built-in_20_Normal">
      <style:table-cell-properties style:glyph-orientation-vertical="0" fo:background-color="#dddddd"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4"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57"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58" style:family="table-cell" style:parent-style-name="標準_20_2_20_8">
      <style:text-properties fo:language="en" fo:country="US" style:text-underline-mode="continuous" style:text-overline-mode="continuous" style:text-line-through-mode="continuous" style:language-asian="ja" style:country-asian="JP" style:font-name-complex="Tahoma" style:language-complex="hi" style:country-complex="IN" style:text-emphasize="none" style:font-relief="none" style:text-overline-style="none" style:text-overline-color="font-color"/>
    </style:style>
    <style:style style:name="ce118"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0" style:family="table-cell" style:parent-style-name="Excel_20_Built-in_20_Heading_20_1" style:data-style-name="N0">
      <style:table-cell-properties style:glyph-orientation-vertical="0" fo:border-bottom="2.49pt solid #4f81bd" style:cell-protect="protected" style:print-content="true" style:text-align-source="fix" style:repeat-content="false" fo:background-color="transparent" fo:wrap-option="wrap" fo:border-left="none" style:direction="ltr" fo:padding="0.071cm" fo:border-right="none" style:rotation-angle="0" style:rotation-align="none" style:shrink-to-fit="true" fo:border-top="non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2"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tru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3"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33"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7" style:family="table-cell" style:parent-style-name="標準_20_2_20_8">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8"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l‚r ƒSƒVƒbƒN" fo:font-size="9pt" fo:language="none" fo:country="none" fo:font-style="normal" fo:text-shadow="none" style:text-underline-style="none" fo:font-weight="normal" style:font-name-asian="ＭＳ ゴシック" style:font-size-asian="9pt" style:language-asian="none" style:country-asian="none" style:font-style-asian="normal" style:font-weight-asian="normal" style:font-name-complex="‚l‚r ƒSƒVƒbƒN" style:font-size-complex="9pt" style:language-complex="none" style:country-complex="none" style:font-style-complex="normal" style:font-weight-complex="normal"/>
    </style:style>
    <style:style style:name="ce139"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80"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text-underline-mode="continuous" style:text-overline-mode="continuous" style:text-line-through-mode="continuous" style:font-name-asian="ＭＳ ゴシック"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ＭＳ ゴシック" fo:font-size="9pt" fo:language="en" fo:country="US" fo:font-style="normal" fo:text-shadow="none" style:text-underline-style="none" fo:font-weight="normal" style:font-name-asian="ＭＳ ゴシック" style:font-size-asian="9pt" style:language-asian="ja" style:country-asian="JP" style:font-style-asian="normal" style:font-weight-asian="normal" style:font-name-complex="Arial" style:font-size-complex="9pt" style:language-complex="hi" style:country-complex="IN" style:font-style-complex="normal" style:font-weight-complex="normal"/>
    </style:style>
    <style:style style:name="ce193"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gr1" style:family="graphic">
      <style:graphic-properties draw:stroke="solid" svg:stroke-width="0.026cm" svg:stroke-color="#217346" draw:marker-start="線の終点_20_1" draw:marker-start-width="0.2cm" draw:marker-start-center="false" draw:stroke-linejoin="miter" draw:fill="solid" draw:fill-color="#ffffc0" draw:textarea-horizontal-align="justify" draw:textarea-vertical-align="top" draw:auto-grow-height="false" draw:auto-grow-width="false" fo:min-height="6.252cm" fo:min-width="11.15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fo:hyphenate="false"/>
    </style:style>
    <style:style style:name="P2"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normal"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solid" style:text-underline-width="auto" style:text-underline-color="font-color"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font-name="Meiryo"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eiryo"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ff" style:font-name="ＭＳ Ｐゴシック"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ＭＳ ゴシック" fo:font-size="9pt" fo:font-weight="normal" style:font-name-asian="ＭＳ ゴシック" style:font-size-asian="9pt" style:font-size-complex="9pt" style:font-weight-asian="normal" style:font-weight-complex="normal"/>
    </style:style>
    <style:style style:name="T7"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color="#000000"/>
    </style:style>
    <style:style style:name="T9" style:family="text">
      <style:text-properties style:font-name="ＭＳ ゴシック"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fo:font-size="9pt" style:font-name-complex="‚l‚r ƒSƒVƒbƒN"/>
    </style:style>
    <style:style style:name="T11"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12pt" style:font-name-complex="Arial"/>
    </style:style>
    <style:style style:name="T12"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font-size="9pt"/>
    </style:style>
    <style:style style:name="T13"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9pt" fo:color="#000000" style:font-name-complex="‚l‚r ƒSƒVƒbƒN"/>
    </style:style>
    <style:style style:name="T14"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color="#000000"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l‚r ƒSƒVƒbƒN" fo:language="none" fo:country="none" style:language-asian="none" style:country-asian="none" style:language-complex="none" style:country-complex="none" style:font-name-complex="‚l‚r ƒSƒVƒbƒN"/>
    </style:style>
    <style:style style:name="T17"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style:style style:name="T18" style:family="text">
      <style:text-properties fo:color="#000000" style:font-name="‚l‚r ƒSƒVƒbƒN" fo:font-size="9pt" style:font-name-asian="ＭＳ ゴシック" style:font-name-complex="‚l‚r ƒSƒVƒbƒN" style:font-size-asian="9pt" style:font-size-complex="9pt"/>
    </style:style>
    <style:style style:name="T19"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style:font-name-complex="Arial"/>
    </style:style>
    <style:style style:name="T21"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style:font-name="‚l‚r ƒSƒVƒbƒN" fo:language="none" fo:country="none" style:language-asian="none" style:country-asian="none" style:language-complex="none" style:country-complex="none" style:font-name-complex="‚l‚r ƒSƒVƒbƒN"/>
    </style:style>
    <style:style style:name="T22" style:family="text">
      <style:text-properties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weight-asian="normal" style:font-weight-complex="normal" style:font-style-asian="normal" style:font-style-complex="normal" style:text-emphasize="none" style:font-relief="none" style:text-overline-style="none" style:text-overline-color="font-color" fo:font-size="10pt" style:font-size-asian="10pt" style:font-size-complex="10pt"/>
    </style:style>
    <style:style style:name="T24"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weight-asian="normal" style:font-weight-complex="normal" style:font-style-asian="normal" style:font-style-complex="normal" style:text-emphasize="none" style:font-relief="none" style:text-overline-style="none" style:text-overline-color="font-color" fo:font-size="9pt" style:font-size-asian="9pt" style:font-size-complex="9pt"/>
    </style:style>
    <style:style style:name="T25"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fo:font-size="9pt" style:font-size-asian="9pt" style:font-size-complex="9pt" fo:color="#000000" style:font-name="‚l‚r ƒSƒVƒbƒN" fo:language="none" fo:country="none" style:language-asian="none" style:country-asian="none" style:language-complex="none" style:country-complex="none" style:font-name-complex="‚l‚r ƒSƒVƒbƒN"/>
    </style:style>
    <style:style style:name="T26"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fo:font-size="9pt" style:font-size-asian="9pt" style:font-size-complex="9pt" style:font-name="ＭＳ ゴシック" fo:language="en" fo:country="US" style:language-asian="ja" style:country-asian="JP" style:language-complex="hi" style:country-complex="IN" style:font-name-complex="Arial"/>
    </style:style>
    <style:style style:name="T27"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fo:font-size="10pt" style:font-size-asian="10pt" style:font-size-complex="10pt"/>
    </style:style>
    <style:style style:name="T28" style:family="text">
      <style:text-properties fo:font-size="9pt" style:font-size-asian="9pt" style:font-size-complex="9pt"/>
    </style:style>
    <style:style style:name="T2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color="#000000"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style:style style:name="T31" style:family="text">
      <style:text-properties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style:font-name="‚l‚r ƒSƒVƒbƒN" style:font-name-complex="‚l‚r ƒSƒVƒbƒN"/>
    </style:style>
    <style:style style:name="T32" style:family="text">
      <style:text-properties style:font-name-asian="‚l‚r ƒSƒVƒbƒN" style:font-name-complex="‚l‚r ƒSƒVƒbƒN" fo:color="#000000" fo:font-size="9pt" style:font-size-asian="9pt" style:font-size-complex="9pt" style:font-name="ＭＳ ゴシック"/>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OK&quot;;&quot;NG&quot;)" table:allow-empty-cell="true" table:display-list="unsorted" table:base-cell-address="ケース01.BL5">
          <table:error-message table:message-type="stop" table:display="true"/>
        </table:content-validation>
        <table:content-validation table:name="val2" table:condition="of:cell-content-is-in-list(&quot;OK&quot;;&quot;NG&quot;)" table:allow-empty-cell="true" table:display-list="unsorted" table:base-cell-address="ケース02.BL5">
          <table:error-message table:message-type="stop" table:display="true"/>
        </table:content-validation>
        <table:content-validation table:name="val3" table:condition="of:cell-content-is-in-list(&quot;OK&quot;;&quot;NG&quot;)" table:allow-empty-cell="true" table:display-list="unsorted" table:base-cell-address="ケース03.BL5">
          <table:error-message table:message-type="stop" table:display="true"/>
        </table:content-validation>
        <table:content-validation table:name="val4" table:condition="of:cell-content-is-in-list(&quot;OK&quot;;&quot;NG&quot;)" table:allow-empty-cell="true" table:display-list="unsorted" table:base-cell-address="ケース04.BL5">
          <table:error-message table:message-type="stop" table:display="true"/>
        </table:content-validation>
        <table:content-validation table:name="val5" table:condition="of:cell-content-is-in-list(&quot;OK&quot;;&quot;NG&quot;)" table:allow-empty-cell="true" table:display-list="unsorted" table:base-cell-address="ケース05.BL5">
          <table:error-message table:message-type="stop" table:display="true"/>
        </table:content-validation>
        <table:content-validation table:name="val6" table:condition="of:cell-content-is-in-list(&quot;OK&quot;;&quot;NG&quot;)" table:allow-empty-cell="true" table:display-list="unsorted" table:base-cell-address="ケース06.BL5">
          <table:error-message table:message-type="stop" table:display="true"/>
        </table:content-validation>
        <table:content-validation table:name="val7" table:condition="of:cell-content-is-in-list(&quot;OK&quot;;&quot;NG&quot;)" table:allow-empty-cell="true" table:display-list="unsorted" table:base-cell-address="ケース07.BL5">
          <table:error-message table:message-type="stop" table:display="true"/>
        </table:content-validation>
        <table:content-validation table:name="val8" table:condition="of:cell-content-is-in-list(&quot;OK&quot;;&quot;NG&quot;)" table:allow-empty-cell="true" table:display-list="unsorted" table:base-cell-address="ケース08.BL5">
          <table:error-message table:message-type="stop" table:display="true"/>
        </table:content-validation>
        <table:content-validation table:name="val9" table:condition="of:cell-content-is-in-list(&quot;OK&quot;;&quot;NG&quot;)" table:allow-empty-cell="true" table:display-list="unsorted" table:base-cell-address="ケース09.BL5">
          <table:error-message table:message-type="stop" table:display="true"/>
        </table:content-validation>
        <table:content-validation table:name="val10" table:condition="of:cell-content-is-in-list(&quot;OK&quot;;&quot;NG&quot;)" table:allow-empty-cell="true" table:display-list="unsorted" table:base-cell-address="ケース10.BL5">
          <table:error-message table:message-type="stop" table:display="true"/>
        </table:content-validation>
        <table:content-validation table:name="val11" table:condition="of:cell-content-is-in-list(&quot;OK&quot;;&quot;NG&quot;)" table:allow-empty-cell="true" table:display-list="unsorted" table:base-cell-address="ケース11.BL5">
          <table:error-message table:message-type="stop" table:display="true"/>
        </table:content-validation>
        <table:content-validation table:name="val12" table:condition="of:cell-content-is-in-list(&quot;OK&quot;;&quot;NG&quot;)" table:allow-empty-cell="true" table:display-list="unsorted" table:base-cell-address="ケース12.BL5">
          <table:error-message table:message-type="stop" table:display="true"/>
        </table:content-validation>
        <table:content-validation table:name="val13" table:condition="of:cell-content-is-in-list(&quot;OK&quot;;&quot;NG&quot;)" table:allow-empty-cell="true" table:display-list="unsorted" table:base-cell-address="ケース13.BL5">
          <table:error-message table:message-type="stop" table:display="true"/>
        </table:content-validation>
        <table:content-validation table:name="val14" table:condition="of:cell-content-is-in-list(&quot;OK&quot;;&quot;NG&quot;)" table:allow-empty-cell="true" table:display-list="unsorted" table:base-cell-address="ケース14.BL5">
          <table:error-message table:message-type="stop" table:display="true"/>
        </table:content-validation>
        <table:content-validation table:name="val15" table:condition="of:cell-content-is-in-list(&quot;OK&quot;;&quot;NG&quot;)" table:allow-empty-cell="true" table:display-list="unsorted" table:base-cell-address="ケース15.BL5">
          <table:error-message table:message-type="stop" table:display="true"/>
        </table:content-validation>
        <table:content-validation table:name="val16" table:condition="of:cell-content-is-in-list(&quot;OK&quot;;&quot;NG&quot;)" table:allow-empty-cell="true" table:display-list="unsorted" table:base-cell-address="ケース16.BL5">
          <table:error-message table:message-type="stop" table:display="true"/>
        </table:content-validation>
        <table:content-validation table:name="val17" table:condition="of:cell-content-is-in-list(&quot;OK&quot;;&quot;NG&quot;)" table:allow-empty-cell="true" table:display-list="unsorted" table:base-cell-address="ケース17.BL5">
          <table:error-message table:message-type="stop" table:display="true"/>
        </table:content-validation>
      </table:content-validations>
      <table:table table:name="表紙" table:style-name="ta1" table:print-ranges="表紙.A1:表紙.E31">
        <office:forms form:automatic-focus="false" form:apply-design-mode="false"/>
        <table:table-column table:style-name="co1" table:default-cell-style-name="ce67"/>
        <table:table-column table:style-name="co2" table:number-columns-repeated="2" table:default-cell-style-name="ce67"/>
        <table:table-column table:style-name="co3" table:default-cell-style-name="ce67"/>
        <table:table-column table:style-name="co4" table:default-cell-style-name="ce76"/>
        <table:table-column table:style-name="co5" table:number-columns-repeated="252" table:default-cell-style-name="ce76"/>
        <table:table-column table:style-name="co5" table:number-columns-repeated="16127" table:default-cell-style-name="Default"/>
        <table:table-row table:style-name="ro1" table:number-rows-repeated="3">
          <table:table-cell table:number-columns-repeated="16384"/>
        </table:table-row>
        <table:table-row table:style-name="ro2">
          <table:table-cell/>
          <table:table-cell table:style-name="ce68" office:value-type="string" calcext:value-type="string">
            <text:p>関係者外秘</text:p>
          </table:table-cell>
          <table:table-cell table:number-columns-repeated="16382"/>
        </table:table-row>
        <table:table-row table:style-name="ro1" table:number-rows-repeated="5">
          <table:table-cell table:number-columns-repeated="16384"/>
        </table:table-row>
        <table:table-row table:style-name="ro3">
          <table:table-cell/>
          <table:table-cell table:style-name="ce69" office:value-type="string" calcext:value-type="string">
            <text:p>LMS学習管理システム</text:p>
          </table:table-cell>
          <table:table-cell table:number-columns-repeated="16382"/>
        </table:table-row>
        <table:table-row table:style-name="ro4">
          <table:table-cell/>
          <table:table-cell table:style-name="ce69" office:value-type="string" calcext:value-type="string">
            <text:p>結合テスト仕様書</text:p>
          </table:table-cell>
          <table:table-cell table:number-columns-repeated="16382"/>
        </table:table-row>
        <table:table-row table:style-name="ro1" table:number-rows-repeated="9">
          <table:table-cell table:number-columns-repeated="16384"/>
        </table:table-row>
        <table:table-row table:style-name="ro5">
          <table:table-cell/>
          <table:table-cell table:style-name="ce70" office:value-type="string" calcext:value-type="string">
            <text:p>更新履歴</text:p>
          </table:table-cell>
          <table:table-cell table:style-name="ce70" table:number-columns-repeated="2"/>
          <table:table-cell table:number-columns-repeated="16380"/>
        </table:table-row>
        <table:table-row table:style-name="ro6">
          <table:table-cell/>
          <table:table-cell table:style-name="ce71" office:value-type="string" calcext:value-type="string">
            <text:p>年月日</text:p>
          </table:table-cell>
          <table:table-cell table:style-name="ce71" office:value-type="string" calcext:value-type="string">
            <text:p>担当者</text:p>
          </table:table-cell>
          <table:table-cell table:style-name="ce71" office:value-type="string" calcext:value-type="string">
            <text:p>内容</text:p>
          </table:table-cell>
          <table:table-cell table:number-columns-repeated="16380"/>
        </table:table-row>
        <table:table-row table:style-name="ro6">
          <table:table-cell/>
          <table:table-cell table:style-name="ce72" office:value-type="date" office:date-value="2026-06-18" calcext:value-type="date">
            <text:p>2026/06/18</text:p>
          </table:table-cell>
          <table:table-cell table:style-name="ce75" office:value-type="string" calcext:value-type="string">
            <text:p>牧野水宥</text:p>
          </table:table-cell>
          <table:table-cell table:style-name="ce75" office:value-type="string" calcext:value-type="string">
            <text:p>ケース01、ケース02編集</text:p>
          </table:table-cell>
          <table:table-cell table:number-columns-repeated="16380"/>
        </table:table-row>
        <table:table-row table:style-name="ro7">
          <table:table-cell/>
          <table:table-cell table:style-name="ce72" office:value-type="date" office:date-value="2026-06-19" calcext:value-type="date">
            <text:p>2026/06/19</text:p>
          </table:table-cell>
          <table:table-cell table:style-name="ce75" office:value-type="string" calcext:value-type="string">
            <text:p>牧野水宥</text:p>
          </table:table-cell>
          <table:table-cell table:style-name="ce75" office:value-type="string" calcext:value-type="string">
            <text:p><text:span text:style-name="T4">ケース03、ケース04、ケース05、ケース06</text:span>編集</text:p>
          </table:table-cell>
          <table:table-cell table:number-columns-repeated="16380"/>
        </table:table-row>
        <table:table-row table:style-name="ro8">
          <table:table-cell/>
          <table:table-cell table:style-name="ce72" office:value-type="date" office:date-value="2026-06-22" calcext:value-type="date">
            <text:p>2026/06/22</text:p>
          </table:table-cell>
          <table:table-cell table:style-name="ce75" office:value-type="string" calcext:value-type="string">
            <text:p>牧野水宥</text:p>
          </table:table-cell>
          <table:table-cell table:style-name="ce73" office:value-type="string" calcext:value-type="string">
            <text:p><text:span text:style-name="T4">ケース07、ケース08、ケース09</text:span>編集</text:p>
          </table:table-cell>
          <table:table-cell table:number-columns-repeated="16380"/>
        </table:table-row>
        <table:table-row table:style-name="ro7">
          <table:table-cell/>
          <table:table-cell table:style-name="ce72" office:value-type="date" office:date-value="2026-06-23" calcext:value-type="date">
            <text:p>2026/06/23</text:p>
          </table:table-cell>
          <table:table-cell table:style-name="ce75" office:value-type="string" calcext:value-type="string">
            <text:p>牧野水宥</text:p>
          </table:table-cell>
          <table:table-cell table:style-name="ce73" office:value-type="string" calcext:value-type="string">
            <text:p>ケース10、ケース11、ケース12、ケース13編集</text:p>
          </table:table-cell>
          <table:table-cell table:number-columns-repeated="16380"/>
        </table:table-row>
        <table:table-row table:style-name="ro7">
          <table:table-cell/>
          <table:table-cell table:style-name="ce72" office:value-type="date" office:date-value="2026-06-24" calcext:value-type="date">
            <text:p>2026/06/24</text:p>
          </table:table-cell>
          <table:table-cell table:style-name="ce75" office:value-type="string" calcext:value-type="string">
            <text:p>牧野水宥</text:p>
          </table:table-cell>
          <table:table-cell table:style-name="ce73" office:value-type="string" calcext:value-type="string">
            <text:p>ケース14、ケース15、ケース16、ケース17編集</text:p>
          </table:table-cell>
          <table:table-cell table:number-columns-repeated="16380"/>
        </table:table-row>
        <table:table-row table:style-name="ro7">
          <table:table-cell/>
          <table:table-cell table:style-name="ce72" office:value-type="date" office:date-value="2026-06-25" calcext:value-type="date">
            <text:p>2026/06/25</text:p>
          </table:table-cell>
          <table:table-cell table:style-name="ce75" office:value-type="string" calcext:value-type="string">
            <text:p>牧野水宥</text:p>
          </table:table-cell>
          <table:table-cell table:style-name="ce73"/>
          <table:table-cell table:number-columns-repeated="16380"/>
        </table:table-row>
        <table:table-row table:style-name="ro9">
          <table:table-cell/>
          <table:table-cell table:style-name="ce73" table:number-columns-repeated="3"/>
          <table:table-cell table:number-columns-repeated="16380"/>
        </table:table-row>
        <table:table-row table:style-name="ro9">
          <table:table-cell/>
          <table:table-cell table:style-name="ce70" table:number-columns-repeated="3"/>
          <table:table-cell table:number-columns-repeated="16380"/>
        </table:table-row>
        <table:table-row table:style-name="ro6">
          <table:table-cell/>
          <table:table-cell table:style-name="ce8" office:value-type="string" calcext:value-type="string" table:number-columns-spanned="3" table:number-rows-spanned="1">
            <text:p>Copyright © 2025 株式会社システムシェアード. All rights reserved.</text:p>
          </table:table-cell>
          <table:covered-table-cell table:number-columns-repeated="2" table:style-name="ce8"/>
          <table:table-cell table:number-columns-repeated="16380"/>
        </table:table-row>
        <table:table-row table:style-name="ro1" table:number-rows-repeated="1048544">
          <table:table-cell table:number-columns-repeated="16384"/>
        </table:table-row>
        <table:table-row table:style-name="ro1">
          <table:table-cell table:number-columns-repeated="16384"/>
        </table:table-row>
        <table:named-expressions>
          <table:named-range table:name="Excel_BuiltIn_Print_Area" table:base-cell-address="$表紙.$A$1" table:cell-range-address="$表紙.$A$1:.$E$31" table:range-usable-as="print-range"/>
        </table:named-expressions>
      </table:table>
      <table:table table:name="ケース一覧" table:style-name="ta2" table:print-ranges="ケース一覧.A1:ケース一覧.BC12">
        <table:table-column table:style-name="co6" table:number-columns-repeated="4" table:default-cell-style-name="ce79"/>
        <table:table-column table:style-name="co6" table:number-columns-repeated="5" table:default-cell-style-name="ce87"/>
        <table:table-column table:style-name="co6" table:number-columns-repeated="48" table:default-cell-style-name="ce79"/>
        <table:table-column table:style-name="co7" table:default-cell-style-name="ce129"/>
        <table:table-column table:style-name="co6" table:number-columns-repeated="199"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81" office:value-type="string" calcext:value-type="string">
            <text:p>テストケース一覧</text:p>
          </table:table-cell>
          <table:table-cell table:style-name="ce81"/>
          <table:table-cell table:style-name="ce85"/>
          <table:table-cell table:style-name="ce88" table:number-columns-repeated="5"/>
          <table:table-cell table:style-name="ce78" table:number-columns-repeated="48"/>
          <table:table-cell table:style-name="ce130"/>
          <table:table-cell table:style-name="ce136" table:number-columns-repeated="16326"/>
        </table:table-row>
        <table:table-row table:style-name="ro1">
          <table:table-cell table:number-columns-repeated="54"/>
          <table:table-cell table:style-name="ce127" office:value-type="string" calcext:value-type="string">
            <text:p>※テストケースは正常系と準正常系に限り行う。</text:p>
          </table:table-cell>
          <table:table-cell table:number-columns-repeated="16329"/>
        </table:table-row>
        <table:table-row table:style-name="ro10">
          <table:table-cell/>
          <table:table-cell table:style-name="ce82" office:value-type="string" calcext:value-type="string" table:number-columns-spanned="3" table:number-rows-spanned="1">
            <text:p>ケースNo</text:p>
          </table:table-cell>
          <table:covered-table-cell table:style-name="ce84"/>
          <table:covered-table-cell table:style-name="ce86"/>
          <table:table-cell table:style-name="ce22" office:value-type="string" calcext:value-type="string" table:number-columns-spanned="7" table:number-rows-spanned="1">
            <text:p>機能名</text:p>
          </table:table-cell>
          <table:covered-table-cell table:number-columns-repeated="5" table:style-name="ce91"/>
          <table:covered-table-cell table:style-name="ce93"/>
          <table:table-cell table:style-name="ce22" office:value-type="string" calcext:value-type="string" table:number-columns-spanned="13" table:number-rows-spanned="1">
            <text:p>ケース名</text:p>
          </table:table-cell>
          <table:covered-table-cell table:number-columns-repeated="11" table:style-name="ce91"/>
          <table:covered-table-cell table:style-name="ce93"/>
          <table:table-cell table:style-name="ce22" office:value-type="string" calcext:value-type="string" table:number-columns-spanned="31" table:number-rows-spanned="1">
            <text:p>概要</text:p>
          </table:table-cell>
          <table:covered-table-cell table:number-columns-repeated="29" table:style-name="ce91"/>
          <table:covered-table-cell table:style-name="ce93"/>
          <table:table-cell table:number-columns-repeated="2"/>
          <table:table-cell table:style-name="ce132" office:value-type="string" calcext:value-type="string">
            <text:p>難易度</text:p>
          </table:table-cell>
          <table:table-cell table:number-columns-repeated="16326"/>
        </table:table-row>
        <table:table-row table:style-name="ro11">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90" office:value-type="string" calcext:value-type="string" table:number-columns-spanned="7" table:number-rows-spanned="1">
            <text:p>ログイン機能①</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1.A1" xlink:type="simple">ログイン画面への遷移</text:a></text:span></text:p>
          </table:table-cell>
          <table:covered-table-cell table:number-columns-repeated="11" table:style-name="ce96"/>
          <table:covered-table-cell table:style-name="ce113"/>
          <table:table-cell table:style-name="ce51" office:value-type="string" calcext:value-type="string" table:number-columns-spanned="31" table:number-rows-spanned="1">
            <text:p>・トップページにアクセスし、ログイン画面が表示される。</text:p>
          </table:table-cell>
          <table:covered-table-cell table:number-columns-repeated="29" table:style-name="ce126"/>
          <table:covered-table-cell table:style-name="ce128"/>
          <table:table-cell table:number-columns-repeated="2"/>
          <table:table-cell table:style-name="ce134" office:value-type="string" calcext:value-type="string">
            <text:p>C</text:p>
          </table:table-cell>
          <table:table-cell table:number-columns-repeated="16326"/>
        </table:table-row>
        <table:table-row table:style-name="ro11">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90" office:value-type="string" calcext:value-type="string" table:number-columns-spanned="7" table:number-rows-spanned="1">
            <text:p>ログイン機能①</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2.A1" xlink:type="simple">受講生 ログイン 認証失敗</text:a></text:span></text:p>
          </table:table-cell>
          <table:covered-table-cell table:number-columns-repeated="11" table:style-name="ce97"/>
          <table:covered-table-cell table:style-name="ce114"/>
          <table:table-cell table:style-name="ce51" office:value-type="string" calcext:value-type="string" table:number-columns-spanned="31" table:number-rows-spanned="1">
            <text:p>・トップページにアクセスし、ログイン画面が表示される。</text:p>
            <text:p>・DBに登録されていないユーザーでログインし、エラーメッセージが表示される。</text:p>
          </table:table-cell>
          <table:covered-table-cell table:number-columns-repeated="29" table:style-name="ce126"/>
          <table:covered-table-cell table:style-name="ce128"/>
          <table:table-cell table:number-columns-repeated="2"/>
          <table:table-cell table:style-name="ce134" office:value-type="string" calcext:value-type="string">
            <text:p>C</text:p>
          </table:table-cell>
          <table:table-cell table:number-columns-repeated="16326"/>
        </table:table-row>
        <table:table-row table:style-name="ro1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90" office:value-type="string" calcext:value-type="string" table:number-columns-spanned="7" table:number-rows-spanned="1">
            <text:p>ログイン機能①</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3.A1" xlink:type="simple">受講生 ログイン 正常系</text:a></text:span></text:p>
          </table:table-cell>
          <table:covered-table-cell table:number-columns-repeated="11" table:style-name="ce98"/>
          <table:covered-table-cell table:style-name="ce115"/>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able:table-cell>
          <table:covered-table-cell table:number-columns-repeated="29" table:style-name="ce126"/>
          <table:covered-table-cell table:style-name="ce128"/>
          <table:table-cell table:number-columns-repeated="2"/>
          <table:table-cell table:style-name="ce134" office:value-type="string" calcext:value-type="string">
            <text:p>C</text:p>
          </table:table-cell>
          <table:table-cell table:number-columns-repeated="16326"/>
        </table:table-row>
        <table:table-row table:style-name="ro1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90" office:value-type="string" calcext:value-type="string" table:number-columns-spanned="7" table:number-rows-spanned="1">
            <text:p>よくある質問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4.A1" xlink:type="simple">よくある質問画面への遷移</text:a></text:span></text:p>
          </table:table-cell>
          <table:covered-table-cell table:number-columns-repeated="12" table:style-name="ce99"/>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able:table-cell>
          <table:covered-table-cell table:number-columns-repeated="29" table:style-name="ce126"/>
          <table:covered-table-cell table:style-name="ce128"/>
          <table:table-cell table:number-columns-repeated="2"/>
          <table:table-cell table:style-name="ce134" office:value-type="string" calcext:value-type="string">
            <text:p>C</text:p>
          </table:table-cell>
          <table:table-cell table:number-columns-repeated="16326"/>
        </table:table-row>
        <table:table-row table:style-name="ro12">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90" office:value-type="string" calcext:value-type="string" table:number-columns-spanned="7" table:number-rows-spanned="1">
            <text:p>よくある質問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5.A1" xlink:type="simple">キーワード検索 正常系</text:a></text:span></text:p>
          </table:table-cell>
          <table:covered-table-cell table:number-columns-repeated="12" table:style-name="ce100"/>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キーワード検索を行い、該当キーワードを含む検索結果だけが表示される。</text:p>
            <text:p>・「クリア」ボタンを押下し、入力したキーワードが消去される。</text:p>
          </table:table-cell>
          <table:covered-table-cell table:number-columns-repeated="29" table:style-name="ce126"/>
          <table:covered-table-cell table:style-name="ce128"/>
          <table:table-cell table:number-columns-repeated="2"/>
          <table:table-cell table:style-name="ce134" office:value-type="string" calcext:value-type="string">
            <text:p>B</text:p>
          </table:table-cell>
          <table:table-cell table:number-columns-repeated="16326"/>
        </table:table-row>
        <table:table-row table:style-name="ro13">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90" office:value-type="string" calcext:value-type="string" table:number-columns-spanned="7" table:number-rows-spanned="1">
            <text:p>よくある質問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6.A1" xlink:type="simple">カテゴリ検索 正常系</text:a></text:span></text:p>
          </table:table-cell>
          <table:covered-table-cell table:number-columns-repeated="12" table:style-name="ce101"/>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カテゴリ検索を行い、該当カテゴリの検索結果だけ表示される。</text:p>
            <text:p>・検索結果の質問を押下し、その回答が表示される。</text:p>
            <text:p/>
          </table:table-cell>
          <table:covered-table-cell table:number-columns-repeated="29" table:style-name="ce126"/>
          <table:covered-table-cell table:style-name="ce128"/>
          <table:table-cell table:number-columns-repeated="2"/>
          <table:table-cell table:style-name="ce134" office:value-type="string" calcext:value-type="string">
            <text:p>B</text:p>
          </table:table-cell>
          <table:table-cell table:number-columns-repeated="16326"/>
        </table:table-row>
        <table:table-row table:style-name="ro14">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90" office:value-type="string" calcext:value-type="string" table:number-columns-spanned="7" table:number-rows-spanned="1">
            <text:p>レポート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7.A1" xlink:type="simple">受講生 レポート新規登録(日報) 正常系</text:a></text:span></text:p>
          </table:table-cell>
          <table:covered-table-cell table:number-columns-repeated="12" table:style-name="ce102"/>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未提出」ステータスの研修日の「詳細」ボタンを押下し、セクション詳細画面に遷移する。</text:p>
            <text:p>・「日報を提出する」ボタンを押下し、レポート登録画面に遷移する。</text:p>
            <text:p>・内容を入力して「提出する」ボタンを押下し、セクション詳細画面のボタン名が更新される。</text:p>
            <text:p/>
          </table:table-cell>
          <table:covered-table-cell table:number-columns-repeated="30" table:style-name="ce51"/>
          <table:table-cell table:number-columns-repeated="2"/>
          <table:table-cell table:style-name="ce134" office:value-type="string" calcext:value-type="string">
            <text:p>C</text:p>
          </table:table-cell>
          <table:table-cell table:number-columns-repeated="16326"/>
        </table:table-row>
        <table:table-row table:style-name="ro15">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90" office:value-type="string" calcext:value-type="string" table:number-columns-spanned="7" table:number-rows-spanned="1">
            <text:p>レポート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8.A1" xlink:type="simple">受講生 レポート修正(週報) 正常系</text:a></text:span></text:p>
          </table:table-cell>
          <table:covered-table-cell table:number-columns-repeated="12" table:style-name="ce103"/>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提出済」ステータスの研修日の「詳細」ボタンを押下し、セクション詳細画面に遷移する。</text:p>
            <text:p>・「提出済み週報を確認する」ボタンを押下し、レポート登録画面に遷移する。</text:p>
            <text:p>・報告内容を修正して「提出する」ボタンを押下し、セクション詳細画面に遷移する。</text:p>
            <text:p>・上部メニューの「ようこそ○○さん」リンクから、ユーザー詳細画面に遷移する。</text:p>
            <text:p>・該当レポートの「詳細」ボタンを押下し、レポート詳細画面で修正内容が反映される。</text:p>
          </table:table-cell>
          <table:covered-table-cell table:number-columns-repeated="30" table:style-name="ce51"/>
          <table:table-cell table:number-columns-repeated="2"/>
          <table:table-cell table:style-name="ce134" office:value-type="string" calcext:value-type="string">
            <text:p>B</text:p>
          </table:table-cell>
          <table:table-cell table:number-columns-repeated="16326"/>
        </table:table-row>
        <table:table-row table:style-name="ro16">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90" office:value-type="string" calcext:value-type="string" table:number-columns-spanned="7" table:number-rows-spanned="1">
            <text:p>レポート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9.A1" xlink:type="simple">受講生 レポート登録 入力チェック</text:a></text:span></text:p>
          </table:table-cell>
          <table:covered-table-cell table:number-columns-repeated="12" table:style-name="ce104"/>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ようこそ○○さん」リンクから、ユーザー詳細画面に遷移する。</text:p>
            <text:p>・該当レポートの「修正する」ボタンを押下し、レポート登録画面に遷移する。</text:p>
            <text:p>・不適切な内容で修正して「提出する」ボタンを押下し、エラー表示される。</text:p>
            <text:p>　【対象】</text:p>
            <text:p>　学習理解度：学習項目か理解度どちらかが未入力</text:p>
            <text:p>　目標の達成度：未入力チェック、数値チェック、範囲チェック(1～10)</text:p>
            <text:p>　所感：未入力チェック、桁数チェック(2000文字)</text:p>
            <text:p>　一週間の振り返り：桁数チェック(2000文字)</text:p>
          </table:table-cell>
          <table:covered-table-cell table:number-columns-repeated="30" table:style-name="ce51"/>
          <table:table-cell table:number-columns-repeated="2"/>
          <table:table-cell table:style-name="ce134" office:value-type="string" calcext:value-type="string">
            <text:p>A</text:p>
          </table:table-cell>
          <table:table-cell table:number-columns-repeated="16326"/>
        </table:table-row>
        <table:table-row table:style-name="ro17">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90" office:value-type="string" calcext:value-type="string" table:number-columns-spanned="7" table:number-rows-spanned="1">
            <text:p>勤怠登録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0.A1" xlink:type="simple">受講生 勤怠登録 正常系</text:a></text:span></text:p>
          </table:table-cell>
          <table:covered-table-cell table:number-columns-repeated="12" table:style-name="ce105"/>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出勤」ボタンを押下し、出勤時間を登録する。</text:p>
            <text:p>・「退勤」ボタンを押下し、退勤時間を登録する。</text:p>
          </table:table-cell>
          <table:covered-table-cell table:number-columns-repeated="30" table:style-name="ce51"/>
          <table:table-cell table:number-columns-repeated="2"/>
          <table:table-cell table:style-name="ce134" office:value-type="string" calcext:value-type="string">
            <text:p>B</text:p>
          </table:table-cell>
          <table:table-cell table:number-columns-repeated="16326"/>
        </table:table-row>
        <table:table-row table:style-name="ro18">
          <table:table-cell/>
          <table:table-cell table:style-name="ce83" office:value-type="float" office:value="11" calcext:value-type="float" table:number-columns-spanned="3" table:number-rows-spanned="1">
            <text:p>11</text:p>
          </table:table-cell>
          <table:covered-table-cell table:number-columns-repeated="2" table:style-name="ce83"/>
          <table:table-cell table:style-name="ce90" office:value-type="string" calcext:value-type="string" table:number-columns-spanned="7" table:number-rows-spanned="1">
            <text:p>勤怠登録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1.A1" xlink:type="simple">受講生 勤怠直接編集 正常系</text:a></text:span></text:p>
          </table:table-cell>
          <table:covered-table-cell table:number-columns-repeated="12" table:style-name="ce106"/>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すべての研修日程の勤怠情報を正しく更新し、勤怠管理画面に遷移する。</text:p>
          </table:table-cell>
          <table:covered-table-cell table:number-columns-repeated="30" table:style-name="ce51"/>
          <table:table-cell table:number-columns-repeated="2"/>
          <table:table-cell table:style-name="ce134" office:value-type="string" calcext:value-type="string">
            <text:p>B</text:p>
          </table:table-cell>
          <table:table-cell table:number-columns-repeated="16326"/>
        </table:table-row>
        <table:table-row table:style-name="ro19">
          <table:table-cell/>
          <table:table-cell table:style-name="ce83" office:value-type="float" office:value="12" calcext:value-type="float" table:number-columns-spanned="3" table:number-rows-spanned="1">
            <text:p>12</text:p>
          </table:table-cell>
          <table:covered-table-cell table:number-columns-repeated="2" table:style-name="ce83"/>
          <table:table-cell table:style-name="ce90" office:value-type="string" calcext:value-type="string" table:number-columns-spanned="7" table:number-rows-spanned="1">
            <text:p>勤怠登録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2.A1" xlink:type="simple">受講生 勤怠直接編集 入力チェック</text:a></text:span></text:p>
          </table:table-cell>
          <table:covered-table-cell table:number-columns-repeated="12" table:style-name="ce107"/>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不適切な内容で修正して「提出する」ボタンを押下し、エラー表示される。</text:p>
            <text:p>　【対象】</text:p>
            <text:p>　出勤、退勤の（時）と（分）のいずれかが空白</text:p>
            <text:p>　出勤が空白で退勤に入力あり</text:p>
            <text:p>　出勤が退勤よりも遅い時間</text:p>
            <text:p>　中抜け時間：出勤時間～退勤時間までの時間を超える</text:p>
            <text:p>　備考：桁数チェック(100文字)</text:p>
          </table:table-cell>
          <table:covered-table-cell table:number-columns-repeated="30" table:style-name="ce51"/>
          <table:table-cell table:number-columns-repeated="2"/>
          <table:table-cell table:style-name="ce134" office:value-type="string" calcext:value-type="string">
            <text:p>B</text:p>
          </table:table-cell>
          <table:table-cell table:number-columns-repeated="16326"/>
        </table:table-row>
        <table:table-row table:style-name="ro20">
          <table:table-cell/>
          <table:table-cell table:style-name="ce83" office:value-type="float" office:value="13" calcext:value-type="float" table:number-columns-spanned="3" table:number-rows-spanned="1">
            <text:p>13</text:p>
          </table:table-cell>
          <table:covered-table-cell table:number-columns-repeated="2" table:style-name="ce83"/>
          <table:table-cell table:style-name="ce90" office:value-type="string" calcext:value-type="string" table:number-columns-spanned="7" table:number-rows-spanned="1">
            <text:p>試験実施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3.A1" xlink:type="simple">受講生 試験の実施 結果0点</text:a></text:span></text:p>
          </table:table-cell>
          <table:covered-table-cell table:number-columns-repeated="12" table:style-name="ce108"/>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すべての問題に未回答の状態で「確認画面へ進む」ボタンを押下し、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26"/>
          <table:covered-table-cell table:style-name="ce128"/>
          <table:table-cell table:number-columns-repeated="2"/>
          <table:table-cell table:style-name="ce134" office:value-type="string" calcext:value-type="string">
            <text:p>A</text:p>
          </table:table-cell>
          <table:table-cell table:number-columns-repeated="16326"/>
        </table:table-row>
        <table:table-row table:style-name="ro21">
          <table:table-cell/>
          <table:table-cell table:style-name="ce83" office:value-type="float" office:value="14" calcext:value-type="float" table:number-columns-spanned="3" table:number-rows-spanned="1">
            <text:p>14</text:p>
          </table:table-cell>
          <table:covered-table-cell table:number-columns-repeated="2" table:style-name="ce83"/>
          <table:table-cell table:style-name="ce90" office:value-type="string" calcext:value-type="string" table:number-columns-spanned="7" table:number-rows-spanned="1">
            <text:p>試験実施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4.A1" xlink:type="simple">受講生 試験の実施 結果50点</text:a></text:span></text:p>
          </table:table-cell>
          <table:covered-table-cell table:number-columns-repeated="12" table:style-name="ce109"/>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問題の半数で正答、もう半数で誤答を選択した状態で、「確認画面へ進む」ボタンを押下し、</text:p>
            <text:p>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26"/>
          <table:covered-table-cell table:style-name="ce128"/>
          <table:table-cell table:number-columns-repeated="2"/>
          <table:table-cell table:style-name="ce134" office:value-type="string" calcext:value-type="string">
            <text:p>A</text:p>
          </table:table-cell>
          <table:table-cell table:number-columns-repeated="16326"/>
        </table:table-row>
        <table:table-row table:style-name="ro11">
          <table:table-cell/>
          <table:table-cell table:style-name="ce83" office:value-type="float" office:value="15" calcext:value-type="float" table:number-columns-spanned="3" table:number-rows-spanned="1">
            <text:p>15</text:p>
          </table:table-cell>
          <table:covered-table-cell table:number-columns-repeated="2" table:style-name="ce83"/>
          <table:table-cell table:style-name="ce90" office:value-type="string" calcext:value-type="string" table:number-columns-spanned="7" table:number-rows-spanned="1">
            <text:p>ログイン機能②</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5.A1" xlink:type="simple">受講生 初回ログイン 利用規約に不同意</text:a></text:span></text:p>
          </table:table-cell>
          <table:covered-table-cell table:number-columns-repeated="12" table:style-name="ce110"/>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同意します」にチェックせず「次へ」ボタンを押下し、エラーメッセージが表示される。</text:p>
          </table:table-cell>
          <table:covered-table-cell table:number-columns-repeated="30" table:style-name="ce51"/>
          <table:table-cell table:number-columns-repeated="2"/>
          <table:table-cell table:style-name="ce134" office:value-type="string" calcext:value-type="string">
            <text:p>C</text:p>
          </table:table-cell>
          <table:table-cell table:number-columns-repeated="16326"/>
        </table:table-row>
        <table:table-row table:style-name="ro22">
          <table:table-cell/>
          <table:table-cell table:style-name="ce83" office:value-type="float" office:value="16" calcext:value-type="float" table:number-columns-spanned="3" table:number-rows-spanned="1">
            <text:p>16</text:p>
          </table:table-cell>
          <table:covered-table-cell table:number-columns-repeated="2" table:style-name="ce83"/>
          <table:table-cell table:style-name="ce90" office:value-type="string" calcext:value-type="string" table:number-columns-spanned="7" table:number-rows-spanned="1">
            <text:p>ログイン機能②</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6.A1" xlink:type="simple">受講生 初回ログイン パスワード変更 入力チェック</text:a></text:span></text:p>
          </table:table-cell>
          <table:covered-table-cell table:number-columns-repeated="11" table:style-name="ce111"/>
          <table:covered-table-cell table:style-name="ce116"/>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不適切な入力状態で「変更」ボタンを押下し、エラー表示される。</text:p>
            <text:p>　【対象】</text:p>
            <text:p>　現在のパスワード：未入力チェック</text:p>
            <text:p>　新しいパスワード：未入力チェック、最大値チェック(20文字)、形式チェック（パスワードポリシー）</text:p>
            <text:p>　　　　　　　　　　現在のパスワードと異なる</text:p>
            <text:p>　確認パスワード：新しいパスワードと同じ</text:p>
          </table:table-cell>
          <table:covered-table-cell table:number-columns-repeated="29" table:style-name="ce126"/>
          <table:covered-table-cell table:style-name="ce128"/>
          <table:table-cell table:number-columns-repeated="2"/>
          <table:table-cell table:style-name="ce134" office:value-type="string" calcext:value-type="string">
            <text:p>B</text:p>
          </table:table-cell>
          <table:table-cell table:number-columns-repeated="16326"/>
        </table:table-row>
        <table:table-row table:style-name="ro11">
          <table:table-cell/>
          <table:table-cell table:style-name="ce83" office:value-type="float" office:value="17" calcext:value-type="float" table:number-columns-spanned="3" table:number-rows-spanned="1">
            <text:p>17</text:p>
          </table:table-cell>
          <table:covered-table-cell table:number-columns-repeated="2" table:style-name="ce83"/>
          <table:table-cell table:style-name="ce90" office:value-type="string" calcext:value-type="string" table:number-columns-spanned="7" table:number-rows-spanned="1">
            <text:p>ログイン機能②</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7.A1" xlink:type="simple">受講生 初回ログイン 正常系</text:a></text:span></text:p>
          </table:table-cell>
          <table:covered-table-cell table:number-columns-repeated="11" table:style-name="ce112"/>
          <table:covered-table-cell table:style-name="ce117"/>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パスワード変更を行い、コース詳細画面に遷移する。</text:p>
          </table:table-cell>
          <table:covered-table-cell table:number-columns-repeated="29" table:style-name="ce126"/>
          <table:covered-table-cell table:style-name="ce128"/>
          <table:table-cell table:number-columns-repeated="2"/>
          <table:table-cell table:style-name="ce134" office:value-type="string" calcext:value-type="string">
            <text:p>B</text:p>
          </table:table-cell>
          <table:table-cell table:number-columns-repeated="16326"/>
        </table:table-row>
        <table:table-row table:style-name="ro1" table:number-rows-repeated="1048554">
          <table:table-cell table:number-columns-repeated="16384"/>
        </table:table-row>
        <table:table-row table:style-name="ro1">
          <table:table-cell table:number-columns-repeated="16384"/>
        </table:table-row>
        <table:named-expressions>
          <table:named-range table:name="Excel_BuiltIn_Print_Area" table:base-cell-address="$表紙.$A$1" table:cell-range-address="$ケース一覧.$A$1:.$BC$12" table:range-usable-as="print-range"/>
        </table:named-expressions>
      </table:table>
      <table:table table:name="ケース01" table:style-name="ta3">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5]" office:value-type="string" office:string-value="ログイン画面への遷移" calcext:value-type="string" table:number-columns-spanned="22" table:number-rows-spanned="1">
            <text:p>ログイン画面への遷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2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24">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1" table:style-name="ce61"/>
          <table:covered-table-cell table:style-name="ce63"/>
          <table:table-cell table:style-name="ce118" table:number-columns-spanned="27" table:number-rows-spanned="1"/>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61"/>
          <table:covered-table-cell table:style-name="ce63"/>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61"/>
          <table:covered-table-cell table:style-name="ce63"/>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61"/>
          <table:covered-table-cell table:style-name="ce63"/>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2" table:style-name="ta4">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6]" office:value-type="string" office:string-value="受講生 ログイン 認証失敗" calcext:value-type="string" table:number-columns-spanned="22" table:number-rows-spanned="1">
            <text:p>受講生 ログイン 認証失敗</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ログイン画面でDBに登録されていないユーザーID・パスワードを入力し、「ログイン」ボタンを押下する。</text:p>
            <text:p/>
            <text:p>入力値：</text:p>
            <text:p>ログインID：Test001</text:p>
            <text:p>パスワード：Test001</text:p>
          </table:table-cell>
          <table:covered-table-cell table:number-columns-repeated="22" table:style-name="ce118"/>
          <table:table-cell table:style-name="ce118" office:value-type="string" calcext:value-type="string" table:number-columns-spanned="27" table:number-rows-spanned="1">
            <text:p>画面遷移せず下記のエラーメッセージが表示されていること。</text:p>
            <text:p>・「ログインに失敗しました。」</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3" table:style-name="ta5">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7]" office:value-type="string" office:string-value="受講生 ログイン 正常系" calcext:value-type="string" table:number-columns-spanned="22" table:number-rows-spanned="1">
            <text:p>受講生 ログイン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26">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4" table:style-name="ta6">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8]" office:value-type="string" office:string-value="よくある質問画面への遷移" calcext:value-type="string" table:number-columns-spanned="22" table:number-rows-spanned="1">
            <text:p>よくある質問画面への遷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26">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text:span text:style-name="T7">ログインが成功し、コース詳細画面に遷移する。</text:span></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上部メニューの「機能」から「ヘルプ」を選択し押下する。</text:p>
          </table:table-cell>
          <table:covered-table-cell table:number-columns-repeated="22" table:style-name="ce118"/>
          <table:table-cell table:style-name="ce118" office:value-type="string" calcext:value-type="string" table:number-columns-spanned="27" table:number-rows-spanned="1">
            <text:p>ヘルプ画面に遷移する。</text:p>
            <text:p><text:span text:style-name="T9">タイトルに「</text:span><text:span text:style-name="T10">ヘルプ | LMS</text:span><text:span text:style-name="T11">」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27">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ヘルプ画面の「よくある質問」を押下する。</text:p>
          </table:table-cell>
          <table:covered-table-cell table:number-columns-repeated="22" table:style-name="ce118"/>
          <table:table-cell table:style-name="ce118" office:value-type="string" calcext:value-type="string" table:number-columns-spanned="27" table:number-rows-spanned="1">
            <text:p>別タブでよくある質問画面へ遷移する。</text:p>
            <text:p>タブ数が2であること。</text:p>
            <text:p><text:span text:style-name="T9">タイトルに「</text:span><text:span text:style-name="T12">よくある質問</text:span><text:span text:style-name="T13"> | LMS</text:span><text:span text:style-name="T11">」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5" table:style-name="ta7">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9]" office:value-type="string" office:string-value="キーワード検索 正常系" calcext:value-type="string" table:number-columns-spanned="22" table:number-rows-spanned="1">
            <text:p>キーワード検索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28">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text:span text:style-name="T7">ログインが成功し、コース詳細画面に遷移する。</text:span></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上部メニューの「機能」から「ヘルプ」を選択し押下する。</text:p>
          </table:table-cell>
          <table:covered-table-cell table:number-columns-repeated="22" table:style-name="ce118"/>
          <table:table-cell table:style-name="ce118" office:value-type="string" calcext:value-type="string" table:number-columns-spanned="27" table:number-rows-spanned="1">
            <text:p>ヘルプ画面に遷移する。</text:p>
            <text:p><text:span text:style-name="T9">タイトルに「</text:span><text:span text:style-name="T10">ヘルプ | LMS</text:span><text:span text:style-name="T11">」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27">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ヘルプ画面の「よくある質問」を押下する。</text:p>
          </table:table-cell>
          <table:covered-table-cell table:number-columns-repeated="22" table:style-name="ce118"/>
          <table:table-cell table:style-name="ce118" office:value-type="string" calcext:value-type="string" table:number-columns-spanned="27" table:number-rows-spanned="1">
            <text:p>別タブでよくある質問画面へ遷移する。</text:p>
            <text:p>タブ数が2であること。</text:p>
            <text:p><text:span text:style-name="T9">タイトルに「</text:span><text:span text:style-name="T12">よくある質問</text:span><text:span text:style-name="T13"> | LMS</text:span><text:span text:style-name="T11">」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29">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キーワード検索でキーワードを入力し「検索」ボタンを押下する。</text:p>
            <text:p/>
            <text:p>入力値：</text:p>
            <text:p>・研修</text:p>
          </table:table-cell>
          <table:covered-table-cell table:number-columns-repeated="22" table:style-name="ce118"/>
          <table:table-cell table:style-name="ce118" office:value-type="string" calcext:value-type="string" table:number-columns-spanned="27" table:number-rows-spanned="1">
            <text:p>よくある質問画面の検索結果が見える位置までスクロールし以下の内容が表示されること。</text:p>
            <text:p/>
            <text:p>検索結果：</text:p>
            <text:p>・助成金書類の作成方法が分かりません</text:p>
            <text:p>・研修の申し込みはどのようにすれば良いですか？</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office:value-type="string" calcext:value-type="string" table:number-columns-spanned="23" table:number-rows-spanned="1">
            <text:p>キーワード検索の「クリア」を押下する。</text:p>
          </table:table-cell>
          <table:covered-table-cell table:number-columns-repeated="22" table:style-name="ce118"/>
          <table:table-cell table:style-name="ce118" office:value-type="string" calcext:value-type="string" table:number-columns-spanned="27" table:number-rows-spanned="1">
            <text:p>よくある質問画面のキーワードに入力されていた文字が消され、空欄になって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6" table:style-name="ta8">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0]" office:value-type="string" office:string-value="カテゴリ検索 正常系" calcext:value-type="string" table:number-columns-spanned="22" table:number-rows-spanned="1">
            <text:p>カテゴリ検索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26">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text:span text:style-name="T7">ログインが成功し、コース詳細画面に遷移する。</text:span></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上部メニューの「機能」から「ヘルプ」を選択し押下する。</text:p>
          </table:table-cell>
          <table:covered-table-cell table:number-columns-repeated="22" table:style-name="ce118"/>
          <table:table-cell table:style-name="ce118" office:value-type="string" calcext:value-type="string" table:number-columns-spanned="27" table:number-rows-spanned="1">
            <text:p>ヘルプ画面に遷移する。</text:p>
            <text:p><text:span text:style-name="T9">タイトルに「</text:span><text:span text:style-name="T10">ヘルプ | LMS</text:span><text:span text:style-name="T11">」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30">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ヘルプ画面の「よくある質問」を押下する。</text:p>
          </table:table-cell>
          <table:covered-table-cell table:number-columns-repeated="22" table:style-name="ce118"/>
          <table:table-cell table:style-name="ce118" office:value-type="string" calcext:value-type="string" table:number-columns-spanned="27" table:number-rows-spanned="1">
            <text:p>別タブでよくある質問画面へ遷移する。</text:p>
            <text:p>タブ数が2であること。</text:p>
            <text:p><text:span text:style-name="T9">タイトルに「</text:span><text:span text:style-name="T12">よくある質問</text:span><text:span text:style-name="T13"> | LMS</text:span><text:span text:style-name="T11">」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3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よくある質問画面のカテゴリ検索の「【研修関係】」を押下する。</text:p>
          </table:table-cell>
          <table:covered-table-cell table:number-columns-repeated="22" table:style-name="ce118"/>
          <table:table-cell table:style-name="ce118" office:value-type="string" calcext:value-type="string" table:number-columns-spanned="27" table:number-rows-spanned="1">
            <text:p><text:span text:style-name="T7">よくある質問画面の検索結果が見える位置までスクロールし以下の内容が表示されること。</text:span></text:p>
            <text:p/>
            <text:p><text:span text:style-name="T7">検索結果：</text:span></text:p>
            <text:p><text:span text:style-name="T7">・キャンセル料・途中退校について</text:span></text:p>
            <text:p><text:span text:style-name="T7">・研修の申し込みはどのようにすれば良いですか？</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3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office:value-type="string" calcext:value-type="string" table:number-columns-spanned="23" table:number-rows-spanned="1">
            <text:p>よくある質問画面の検索結果の下記の質問を押下する。</text:p>
            <text:p/>
            <text:p>質問：</text:p>
            <text:p>・キャンセル料・途中退校について</text:p>
          </table:table-cell>
          <table:covered-table-cell table:number-columns-repeated="22" table:style-name="ce118"/>
          <table:table-cell table:style-name="ce118" office:value-type="string" calcext:value-type="string" table:number-columns-spanned="27" table:number-rows-spanned="1">
            <text:p>よくある質問画面の選択した質問の下に下記の内容が表示されること。</text:p>
            <text:p/>
            <text:p>回答：</text:p>
            <text:p>受講者の退職や解雇等、やむを得ない事情による途中終了に関してなど、事情をお伺いした上で、協議という形を取らせて頂きます。 弊社営業担当までご相談下さい。</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7" table:style-name="ta9">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1]" office:value-type="string" office:string-value="受講生 レポート新規登録(日報) 正常系" calcext:value-type="string" table:number-columns-spanned="22" table:number-rows-spanned="1">
            <text:p>受講生 レポート新規登録(日報)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text:span text:style-name="T7">コース詳細画面の上から見て最初にある</text:span>「未提出」ステータスの研修日の「詳細」ボタンを押下。</text:p>
          </table:table-cell>
          <table:covered-table-cell table:number-columns-repeated="22" table:style-name="ce118"/>
          <table:table-cell table:style-name="ce118" office:value-type="string" calcext:value-type="string" table:number-columns-spanned="27" table:number-rows-spanned="1">
            <text:p>セクション詳細画面に遷移する。</text:p>
            <text:p><text:span text:style-name="T7">タイトルに「セクション詳細 | LMS</text:span>」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6">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セクション詳細画面の「日報【デモ】を提出する」ボタンを押下する。</text:p>
          </table:table-cell>
          <table:covered-table-cell table:number-columns-repeated="22" table:style-name="ce118"/>
          <table:table-cell table:style-name="ce118" office:value-type="string" calcext:value-type="string" table:number-columns-spanned="27" table:number-rows-spanned="1">
            <text:p>レポート登録画面に遷移する。</text:p>
            <text:p><text:span text:style-name="T7">タイトルに「レポート登録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3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レポート登録画面の「本日の報告内容をお書きください。」に下記の内容を入力し、「提出する」ボタンを押下する。</text:p>
            <text:p/>
            <text:p>内容：</text:p>
            <text:p>Case07：受講生　レポート新規登録（日報）正常系</text:p>
          </table:table-cell>
          <table:covered-table-cell table:number-columns-repeated="22" table:style-name="ce118"/>
          <table:table-cell table:style-name="ce118" office:value-type="string" calcext:value-type="string" table:number-columns-spanned="27" table:number-rows-spanned="1">
            <text:p>セクション詳細画面に遷移する。</text:p>
            <text:p>レポートのボタン名が「提出済み日報【デモ】を確認する」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8" table:style-name="ta10">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2]" office:value-type="string" office:string-value="受講生 レポート修正(週報) 正常系" calcext:value-type="string" table:number-columns-spanned="22" table:number-rows-spanned="1">
            <text:p>受講生 レポート修正(週報)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32">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コース詳細画面の「提出済み」ステータスの研修日の「詳細」ボタンを押下。</text:p>
          </table:table-cell>
          <table:covered-table-cell table:number-columns-repeated="22" table:style-name="ce118"/>
          <table:table-cell table:style-name="ce118" office:value-type="string" calcext:value-type="string" table:number-columns-spanned="27" table:number-rows-spanned="1">
            <text:p>セクション詳細画面に遷移する。</text:p>
            <text:p><text:span text:style-name="T7">研修日</text:span>が保存される。</text:p>
            <text:p><text:span text:style-name="T7">タイトルに「セクション詳細 | LMS</text:span>」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6">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セクション詳細画面の2022年10月2日の「提出済み週報【デモ】を確認する」を押下する。</text:p>
          </table:table-cell>
          <table:covered-table-cell table:number-columns-repeated="22" table:style-name="ce118"/>
          <table:table-cell table:style-name="ce118" office:value-type="string" calcext:value-type="string" table:number-columns-spanned="27" table:number-rows-spanned="1">
            <text:p><text:span text:style-name="T7">レポート登録画面に遷移する。</text:span></text:p>
            <text:p><text:span text:style-name="T7">タイトルに「レポート登録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3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レポート登録画面の「一週間の振り返り」にすべてクリアしてから下記の内容を入力し、「提出する」ボタンを押下する。</text:p>
            <text:p/>
            <text:p>内容：</text:p>
            <text:p>Case08：受講生　レポート修正（週報）正常系</text:p>
          </table:table-cell>
          <table:covered-table-cell table:number-columns-repeated="22" table:style-name="ce118"/>
          <table:table-cell table:style-name="ce118" office:value-type="string" calcext:value-type="string" table:number-columns-spanned="27" table:number-rows-spanned="1">
            <text:p><text:span text:style-name="T7">セクション詳細画面に遷移する。</text:span></text:p>
            <text:p><text:span text:style-name="T7">タイトルに「セクション詳細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6">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38" office:value-type="string" calcext:value-type="string" table:number-columns-spanned="23" table:number-rows-spanned="1">
            <text:p><text:span text:style-name="T7">セクション詳細画面の</text:span>上部メニューの「ようこそ○○さん」を押下する。</text:p>
          </table:table-cell>
          <table:covered-table-cell table:number-columns-repeated="22" table:style-name="ce118"/>
          <table:table-cell table:style-name="ce138" office:value-type="string" calcext:value-type="string" table:number-columns-spanned="27" table:number-rows-spanned="1">
            <text:p>ユーザー詳細画面に遷移する。</text:p>
            <text:p><text:span text:style-name="T15">タイトルに「</text:span><text:span text:style-name="T16">ユーザー詳細</text:span><text:span text:style-name="T1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33">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38" office:value-type="string" calcext:value-type="string" table:number-columns-spanned="23" table:number-rows-spanned="1">
            <text:p><text:span text:style-name="T14">ユーザー詳細画面</text:span>該当レポートの「詳細」ボタンを押下する。</text:p>
          </table:table-cell>
          <table:covered-table-cell table:number-columns-repeated="22" table:style-name="ce118"/>
          <table:table-cell table:style-name="ce118" office:value-type="string" calcext:value-type="string" table:number-columns-spanned="27" table:number-rows-spanned="1">
            <text:p>レポート詳細画面に遷移する。</text:p>
            <text:p><text:span text:style-name="T15">タイトルに「レポート詳細 | LMS」と表示されること。</text:span></text:p>
            <text:p><text:span text:style-name="T15">テスト03で選択した研修日のレポートの「一週間の振り返り」に下記の内容が表示されること。</text:span></text:p>
            <text:p/>
            <text:p><text:span text:style-name="T15">内容：</text:span></text:p>
            <text:p><text:span text:style-name="T15">Case08：受講生　レポート修正（週報）正常系</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9" table:style-name="ta11">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3]" office:value-type="string" office:string-value="受講生 レポート登録 入力チェック" calcext:value-type="string" table:number-columns-spanned="22" table:number-rows-spanned="1">
            <text:p>受講生 レポート登録 入力チェック</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38" office:value-type="string" calcext:value-type="string" table:number-columns-spanned="23" table:number-rows-spanned="1">
            <text:p><text:span text:style-name="T7">コース詳細画面の</text:span>上部メニューの「ようこそ○○さん」を押下する。</text:p>
          </table:table-cell>
          <table:covered-table-cell table:number-columns-repeated="22" table:style-name="ce118"/>
          <table:table-cell table:style-name="ce138" office:value-type="string" calcext:value-type="string" table:number-columns-spanned="27" table:number-rows-spanned="1">
            <text:p>ユーザー詳細画面に遷移する。</text:p>
            <text:p><text:span text:style-name="T15">タイトルに「</text:span><text:span text:style-name="T16">ユーザー詳細</text:span><text:span text:style-name="T1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6">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text:span text:style-name="T14">ユーザー詳細</text:span><text:span text:style-name="T17">画面の上から見て最初にある</text:span>「週報【デモ】」ステータスの研修日の「修正する」ボタンを押下。</text:p>
          </table:table-cell>
          <table:covered-table-cell table:number-columns-repeated="22" table:style-name="ce118"/>
          <table:table-cell table:style-name="ce118" office:value-type="string" calcext:value-type="string" table:number-columns-spanned="27" table:number-rows-spanned="1">
            <text:p>レポート登録画面に遷移する。</text:p>
            <text:p><text:span text:style-name="T7">タイトルに「レポート登録 | LMS</text:span>」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34">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学習項目をクリアし「提出する」を押下する。</text:p>
            <text:p/>
            <text:p>・入力値：</text:p>
            <text:p>学習項目　　　　：空欄</text:p>
            <text:p>理解度　　　　　：2</text:p>
            <text:p>目標の達成度　　：5</text:p>
            <text:p>所感　　　　　　：週報のサンプルです。</text:p>
            <text:p>一週間の振り返り：Case09：受講生　レポート登録（週報）入力チェック</text:p>
          </table:table-cell>
          <table:covered-table-cell table:number-columns-repeated="21" table:style-name="ce121"/>
          <table:covered-table-cell table:style-name="ce124"/>
          <table:table-cell table:style-name="ce118" office:value-type="string" calcext:value-type="string" table:number-columns-spanned="27" table:number-rows-spanned="1">
            <text:p>必須項目未入力のため、レポート登録画面のままとなること。</text:p>
            <text:p>入力欄がエラー表示になること。</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34">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office:value-type="string" calcext:value-type="string" table:number-columns-spanned="23" table:number-rows-spanned="1">
            <text:p>理解度をクリアし「提出する」を押下する。</text:p>
            <text:p/>
            <text:p>・入力値：</text:p>
            <text:p><text:span text:style-name="T7">学習項目　　　　：ITリテラシー①</text:span></text:p>
            <text:p>理解度　　　　　：空欄</text:p>
            <text:p><text:span text:style-name="T7">目標の達成度　　：5</text:span></text:p>
            <text:p><text:span text:style-name="T7">所感　　　　　　：週報のサンプルです。</text:span></text:p>
            <text:p><text:span text:style-name="T7">一週間の振り返り：Case09：受講生　レポート登録（週報）入力チェック</text:span></text:p>
          </table:table-cell>
          <table:covered-table-cell table:number-columns-repeated="21" table:style-name="ce121"/>
          <table:covered-table-cell table:style-name="ce124"/>
          <table:table-cell table:style-name="ce118" office:value-type="string" calcext:value-type="string" table:number-columns-spanned="27" table:number-rows-spanned="1">
            <text:p><text:span text:style-name="T7">必須項目未入力のため、レポート登録画面のままとなること。</text:span></text:p>
            <text:p><text:span text:style-name="T7">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34">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office:value-type="string" calcext:value-type="string" table:number-columns-spanned="23" table:number-rows-spanned="1">
            <text:p>目標の達成度を<text:span text:style-name="T18">数値以外の文字を入力し</text:span>「提出する」を押下する。</text:p>
            <text:p/>
            <text:p>・入力値：</text:p>
            <text:p><text:span text:style-name="T7">学習項目　　　　：ITリテラシー①</text:span></text:p>
            <text:p><text:span text:style-name="T7">理解度　　　　　：2</text:span></text:p>
            <text:p><text:span text:style-name="T7">目標の達成度　　：できた</text:span></text:p>
            <text:p><text:span text:style-name="T7">所感　　　　　　：週報のサンプルです。</text:span></text:p>
            <text:p><text:span text:style-name="T7">一週間の振り返り：Case09：受講生　レポート登録（週報）入力チェック</text:span></text:p>
          </table:table-cell>
          <table:covered-table-cell table:number-columns-repeated="21" table:style-name="ce121"/>
          <table:covered-table-cell table:style-name="ce124"/>
          <table:table-cell table:style-name="ce118" office:value-type="string" calcext:value-type="string" table:number-columns-spanned="27" table:number-rows-spanned="1">
            <text:p><text:span text:style-name="T19">数値以外が入力されたため</text:span><text:span text:style-name="T20">、レポート登録画面のままとなること。</text:span></text:p>
            <text:p><text:span text:style-name="T7">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34">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office:value-type="string" calcext:value-type="string" table:number-columns-spanned="23" table:number-rows-spanned="1">
            <text:p>目標の達成度を範囲外の数値で<text:span text:style-name="T18">入力し</text:span>「提出する」を押下する。</text:p>
            <text:p/>
            <text:p>・入力値：</text:p>
            <text:p><text:span text:style-name="T7">学習項目　　　　：ITリテラシー①</text:span></text:p>
            <text:p><text:span text:style-name="T7">理解度　　　　　：2</text:span></text:p>
            <text:p><text:span text:style-name="T7">目標の達成度　　：20</text:span></text:p>
            <text:p><text:span text:style-name="T7">所感　　　　　　：週報のサンプルです。</text:span></text:p>
            <text:p><text:span text:style-name="T7">一週間の振り返り：Case09：受講生　レポート登録（週報）入力チェック</text:span></text:p>
          </table:table-cell>
          <table:covered-table-cell table:number-columns-repeated="21" table:style-name="ce121"/>
          <table:covered-table-cell table:style-name="ce124"/>
          <table:table-cell table:style-name="ce118" office:value-type="string" calcext:value-type="string" table:number-columns-spanned="27" table:number-rows-spanned="1">
            <text:p><text:span text:style-name="T19">範囲外数値が入力されたため</text:span><text:span text:style-name="T20">、レポート登録画面のままとなること。</text:span></text:p>
            <text:p><text:span text:style-name="T7">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34">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office:value-type="string" calcext:value-type="string" table:number-columns-spanned="23" table:number-rows-spanned="1">
            <text:p><text:span text:style-name="T7">目標の達成度、所感</text:span>をクリアし「提出する」を押下する。</text:p>
            <text:p/>
            <text:p>・入力値：</text:p>
            <text:p><text:span text:style-name="T7">学習項目　　　　：ITリテラシー①</text:span></text:p>
            <text:p><text:span text:style-name="T7">理解度　　　　　：2</text:span></text:p>
            <text:p><text:span text:style-name="T7">目標の達成度　　：空欄</text:span></text:p>
            <text:p><text:span text:style-name="T7">所感　　　　　　：空欄</text:span></text:p>
            <text:p><text:span text:style-name="T7">一週間の振り返り：Case09：受講生　レポート登録（週報）入力チェック</text:span></text:p>
          </table:table-cell>
          <table:covered-table-cell table:number-columns-repeated="21" table:style-name="ce121"/>
          <table:covered-table-cell table:style-name="ce124"/>
          <table:table-cell table:style-name="ce118" office:value-type="string" calcext:value-type="string" table:number-columns-spanned="27" table:number-rows-spanned="1">
            <text:p><text:span text:style-name="T7">必須項目未入力のため、レポート登録画面のままとなること。</text:span></text:p>
            <text:p><text:span text:style-name="T7">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34">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office:value-type="string" calcext:value-type="string" table:number-columns-spanned="23" table:number-rows-spanned="1">
            <text:p><text:span text:style-name="T7">所感、一週間の振り返りに2001文字以上入力し</text:span>「提出する」を押下する。</text:p>
            <text:p/>
            <text:p>・入力値：</text:p>
            <text:p><text:span text:style-name="T7">学習項目　　　　：ITリテラシー①</text:span></text:p>
            <text:p><text:span text:style-name="T7">理解度　　　　　：2</text:span></text:p>
            <text:p><text:span text:style-name="T7">目標の達成度　　：5</text:span></text:p>
            <text:p><text:span text:style-name="T7">所感　　　　　　：あ×2001</text:span></text:p>
            <text:p><text:span text:style-name="T7">一週間の振り返り：あ×2001</text:span></text:p>
          </table:table-cell>
          <table:covered-table-cell table:number-columns-repeated="21" table:style-name="ce121"/>
          <table:covered-table-cell table:style-name="ce124"/>
          <table:table-cell table:style-name="ce118" office:value-type="string" calcext:value-type="string" table:number-columns-spanned="27" table:number-rows-spanned="1">
            <text:p><text:span text:style-name="T7">文字数超過のため、レポート登録画面のままとなること。</text:span></text:p>
            <text:p><text:span text:style-name="T7">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0" table:style-name="ta12">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4]" office:value-type="string" office:string-value="受講生 勤怠登録 正常系" calcext:value-type="string" table:number-columns-spanned="22" table:number-rows-spanned="1">
            <text:p>受講生 勤怠登録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9" table:number-columns-spanned="5" table:number-rows-spanned="1"/>
          <table:covered-table-cell table:number-columns-repeated="4" table:style-name="ce139"/>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38" office:value-type="string" calcext:value-type="string" table:number-columns-spanned="23" table:number-rows-spanned="1">
            <text:p><text:span text:style-name="T7">コース詳細画面の</text:span>上部メニューの「勤怠」を押下する。</text:p>
          </table:table-cell>
          <table:covered-table-cell table:number-columns-repeated="22" table:style-name="ce118"/>
          <table:table-cell table:style-name="ce138" office:value-type="string" calcext:value-type="string" table:number-columns-spanned="27" table:number-rows-spanned="1">
            <text:p><text:span text:style-name="T14">勤怠情報変更</text:span>画面に遷移する。</text:p>
            <text:p><text:span text:style-name="T15">タイトルに「勤怠情報変更｜LMS</text:span><text:span text:style-name="T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38" office:value-type="string" calcext:value-type="string" table:number-columns-spanned="23" table:number-rows-spanned="1">
            <text:p>勤怠情報変更画面の「出勤」ボタン、確認ダイアログの「OK」を押下する。</text:p>
          </table:table-cell>
          <table:covered-table-cell table:number-columns-repeated="22" table:style-name="ce118"/>
          <table:table-cell table:style-name="ce118" office:value-type="string" calcext:value-type="string" table:number-columns-spanned="27" table:number-rows-spanned="1">
            <text:p><text:span text:style-name="T14">勤怠情報変更画面にて</text:span>出勤時間が表示されること。</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38" office:value-type="string" calcext:value-type="string" table:number-columns-spanned="23" table:number-rows-spanned="1">
            <office:annotation office:display="true" draw:style-name="gr1" draw:text-style-name="P2" svg:width="11.652cm" svg:height="6.512cm" svg:x="22.86cm" svg:y="10.359cm" draw:caption-point-x="-8.63cm" draw:caption-point-y="-2.89cm">
              <dc:date>2026-06-22T00:00:00</dc:date>
              <text:p text:style-name="P1"><text:span text:style-name="T1">DB</text:span><text:span text:style-name="T1">データの「</text:span><text:span text:style-name="T1">DEMO</text:span><text:span text:style-name="T1">コース」は</text:span><text:span text:style-name="T1">2022</text:span><text:span text:style-name="T1">年の日付であるため、</text:span></text:p>
              <text:p text:style-name="P1"><text:span text:style-name="T1">テストを実施するにあたり、事前にコース情報を変更しておく必要がある。</text:span></text:p>
              <text:p text:style-name="P1"><text:span text:style-name="T1"/></text:p>
              <text:p text:style-name="P1"><text:span text:style-name="T1">【手順】</text:span></text:p>
              <text:p text:style-name="P1"><text:span text:style-name="T1">①</text:span><text:span text:style-name="T1">管理者アカウントでログイン</text:span></text:p>
              <text:p text:style-name="P1"><text:span text:style-name="T1"/></text:p>
              <text:p text:style-name="P1"><text:span text:style-name="T1">②</text:span><text:span text:style-name="T1">コース一覧 </text:span><text:span text:style-name="T1">&gt; DEMO</text:span><text:span text:style-name="T1">コースの変更ボタン </text:span><text:span text:style-name="T1">&gt; </text:span><text:span text:style-name="T1">コース変更画面</text:span></text:p>
              <text:p text:style-name="P1"><text:span text:style-name="T1">以下の日程に編集する。</text:span></text:p>
              <text:p text:style-name="P1"><text:span text:style-name="T1"/></text:p>
              <text:p text:style-name="P1"><text:span text:style-name="T1">　開始日 </text:span><text:span text:style-name="T1">-&gt; </text:span><text:span text:style-name="T2">テスト実行日の前日</text:span><text:span text:style-name="T1">（コース内容</text:span><text:span text:style-name="T1">:</text:span><text:span text:style-name="T1">ハードウェア、ソフトウェア、</text:span><text:span text:style-name="T1">WWW</text:span><text:span text:style-name="T1">）</text:span></text:p>
              <text:p text:style-name="P1"><text:span text:style-name="T1">　終了日 </text:span><text:span text:style-name="T1">-&gt; </text:span><text:span text:style-name="T2">テスト実行日</text:span><text:span text:style-name="T1">（コース内容</text:span><text:span text:style-name="T1">:</text:span><text:span text:style-name="T1">アルゴリズム、フローチャート）</text:span></text:p>
              <text:p text:style-name="P1"><text:span text:style-name="T1">　</text:span><text:span text:style-name="T3">計</text:span><text:span text:style-name="T3">2</text:span><text:span text:style-name="T3">日間に変更</text:span><text:span text:style-name="T1">し、決定ボタン。</text:span></text:p>
              <text:p text:style-name="P1"><text:span text:style-name="T1"/></text:p>
              <text:p text:style-name="P1"><text:span text:style-name="T1">③</text:span><text:span text:style-name="T1">コース詳細変更画面で、余分なセクションとカテゴリーを削除し、決定ボタン。</text:span></text:p>
              <text:p text:style-name="P1"><text:span text:style-name="T1"/></text:p>
              <text:p text:style-name="P1"><text:span text:style-name="T1">④</text:span><text:span text:style-name="T1">コース詳細画面で、コース最終日がテスト実行日となり、背景が青く表示されていれば、このテストは正常に動作する。　</text:span></text:p>
            </office:annotation>
            <text:p><text:span text:style-name="T14">勤怠情報変更画面の「退勤」ボタン、確認ダイアログの「OK」を押下する。</text:span></text:p>
          </table:table-cell>
          <table:covered-table-cell table:number-columns-repeated="22" table:style-name="ce118"/>
          <table:table-cell table:style-name="ce118" office:value-type="string" calcext:value-type="string" table:number-columns-spanned="27" table:number-rows-spanned="1">
            <text:p><text:span text:style-name="T14">勤怠情報変更画面にて</text:span>退勤時間が表示されること。</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1" table:style-name="ta13">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5]" office:value-type="string" office:string-value="受講生 勤怠直接編集 正常系" calcext:value-type="string" table:number-columns-spanned="22" table:number-rows-spanned="1">
            <text:p>受講生 勤怠直接編集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9" table:number-columns-spanned="5" table:number-rows-spanned="1"/>
          <table:covered-table-cell table:number-columns-repeated="4" table:style-name="ce139"/>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3">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38" office:value-type="string" calcext:value-type="string" table:number-columns-spanned="23" table:number-rows-spanned="1">
            <text:p><text:span text:style-name="T15">コース詳細画面の</text:span><text:span text:style-name="T16">上部メニューの「勤怠」を押下し、「勤怠情報を直接編集する」を押下する。勤怠情報をすべて空欄にし、「更新」ボタンを押下する。</text:span></text:p>
          </table:table-cell>
          <table:covered-table-cell table:number-columns-repeated="22" table:style-name="ce118"/>
          <table:table-cell table:style-name="ce138" office:value-type="string" calcext:value-type="string" table:number-columns-spanned="27" table:number-rows-spanned="1">
            <text:p><text:span text:style-name="T14">勤怠管理画面に遷移し、</text:span><text:span text:style-name="T17">勤怠情報直接変更画面に遷移する。</text:span></text:p>
            <text:p><text:span text:style-name="T7">勤怠情報がすべて空欄となる。</text:span></text:p>
            <text:p><text:span text:style-name="T14">勤怠管理画面に遷移する。</text:span></text:p>
            <text:p><text:span text:style-name="T15">タイトルに「勤怠情報変更｜LMS</text:span><text:span text:style-name="T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6">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38" office:value-type="string" calcext:value-type="string" table:number-columns-spanned="23" table:number-rows-spanned="1">
            <text:p>勤怠情報変更画面の「勤怠情報を直接編集する」を押下する。</text:p>
          </table:table-cell>
          <table:covered-table-cell table:number-columns-repeated="22" table:style-name="ce118"/>
          <table:table-cell table:style-name="ce118" office:value-type="string" calcext:value-type="string" table:number-columns-spanned="27" table:number-rows-spanned="1">
            <text:p>勤怠情報直接変更画面に遷移する。</text:p>
            <text:p><text:span text:style-name="T15">タイトルに「勤怠情報変更｜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35">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text:span text:style-name="T7">勤怠情報直接変更画面にてすべての日程に以下の内容を入力し「更新」ボタン、</text:span><text:span text:style-name="T21">確認ダイアログの「OK」</text:span><text:span text:style-name="T17">を押下する。</text:span></text:p>
            <text:p/>
            <text:p><text:span text:style-name="T7">・入力値：</text:span></text:p>
            <text:p><text:span text:style-name="T7">出勤：09：00</text:span></text:p>
            <text:p><text:span text:style-name="T7">退勤：18：00</text:span></text:p>
          </table:table-cell>
          <table:covered-table-cell table:number-columns-repeated="22" table:style-name="ce118"/>
          <table:table-cell table:style-name="ce138" office:value-type="string" calcext:value-type="string" table:number-columns-spanned="27" table:number-rows-spanned="1">
            <text:p><text:span text:style-name="T22">勤怠管理画面に遷移する。</text:span></text:p>
            <text:p><text:span text:style-name="T22">すべての日程に出勤時間、退勤時間が表示され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2" table:style-name="ta14">
        <office:forms form:automatic-focus="false" form:apply-design-mode="false"/>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6]" office:value-type="string" office:string-value="受講生 勤怠直接編集 入力チェック" calcext:value-type="string" table:number-columns-spanned="22" table:number-rows-spanned="1">
            <text:p>受講生 勤怠直接編集 入力チェック</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9" table:number-columns-spanned="5" table:number-rows-spanned="1"/>
          <table:covered-table-cell table:number-columns-repeated="4" table:style-name="ce139"/>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38" office:value-type="string" calcext:value-type="string" table:number-columns-spanned="23" table:number-rows-spanned="1">
            <text:p><text:span text:style-name="T7">コース詳細画面の</text:span>上部メニューの「勤怠」を押下する。</text:p>
          </table:table-cell>
          <table:covered-table-cell table:number-columns-repeated="22" table:style-name="ce118"/>
          <table:table-cell table:style-name="ce138" office:value-type="string" calcext:value-type="string" table:number-columns-spanned="27" table:number-rows-spanned="1">
            <text:p><text:span text:style-name="T18">勤怠管理画面</text:span><text:span text:style-name="T28">に遷移する。</text:span></text:p>
            <text:p><text:span text:style-name="T15">タイトルに「勤怠情報変更｜LMS</text:span><text:span text:style-name="T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6">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38" office:value-type="string" calcext:value-type="string" table:number-columns-spanned="23" table:number-rows-spanned="1">
            <text:p>勤怠情報変更画面の「勤怠情報を直接編集する」を押下する。</text:p>
          </table:table-cell>
          <table:covered-table-cell table:number-columns-repeated="22" table:style-name="ce118"/>
          <table:table-cell table:style-name="ce118" office:value-type="string" calcext:value-type="string" table:number-columns-spanned="27" table:number-rows-spanned="1">
            <text:p>勤怠情報直接変更画面に遷移する。</text:p>
            <text:p><text:span text:style-name="T15">タイトルに「勤怠情報変更｜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36">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80" office:value-type="string" calcext:value-type="string" table:number-columns-spanned="23" table:number-rows-spanned="1">
            <text:p><text:span text:style-name="T7">勤怠情報直接変更画面にて</text:span><text:span text:style-name="T23">出勤、退勤を以下の内容で入力し</text:span><text:span text:style-name="T24">「更新」ボタン、</text:span><text:span text:style-name="T25">確認ダイアログの「OK」</text:span><text:span text:style-name="T26">を押下する。</text:span></text:p>
            <text:p/>
            <text:p><text:span text:style-name="T7">・入力値</text:span></text:p>
            <text:p><text:span text:style-name="T7">出勤：09　：空欄</text:span></text:p>
            <text:p><text:span text:style-name="T7">退勤：空欄：00</text:span></text:p>
          </table:table-cell>
          <table:covered-table-cell table:number-columns-repeated="22" table:style-name="ce118"/>
          <table:table-cell table:style-name="ce118" office:value-type="string" calcext:value-type="string" table:number-columns-spanned="27" table:number-rows-spanned="1">
            <text:p><text:span text:style-name="T7">未入力のため、勤怠情報直接変更画面</text:span>のままとなること。</text:p>
            <text:p><text:span text:style-name="T7">出勤時間（分）、退勤時間（時）の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37">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80" office:value-type="string" calcext:value-type="string" table:number-columns-spanned="23" table:number-rows-spanned="1">
            <text:p><text:span text:style-name="T7">勤怠情報直接変更画面にて</text:span><text:span text:style-name="T23">出勤、退勤を以下の内容で入力し</text:span><text:span text:style-name="T24">「更新」ボタン、</text:span><text:span text:style-name="T25">確認ダイアログの「OK」</text:span><text:span text:style-name="T26">を押下する。</text:span>　</text:p>
            <text:p/>
            <text:p><text:span text:style-name="T7">・入力値</text:span></text:p>
            <text:p><text:span text:style-name="T7">出勤：空欄：空欄</text:span></text:p>
            <text:p><text:span text:style-name="T7">退勤：18　：00</text:span></text:p>
          </table:table-cell>
          <table:covered-table-cell table:number-columns-repeated="22" table:style-name="ce118"/>
          <table:table-cell table:style-name="ce118" office:value-type="string" calcext:value-type="string" table:number-columns-spanned="27" table:number-rows-spanned="1">
            <text:p><text:span text:style-name="T7">未入力のため、勤怠情報直接変更画面のままとなること。</text:span></text:p>
            <text:p><text:span text:style-name="T7">出勤時間の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37">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80" office:value-type="string" calcext:value-type="string" table:number-columns-spanned="23" table:number-rows-spanned="1">
            <text:p><text:span text:style-name="T7">勤怠情報直接変更画面にて</text:span><text:span text:style-name="T23">出勤、退勤を以下の内容で入力し</text:span><text:span text:style-name="T24">「更新」ボタン、</text:span><text:span text:style-name="T25">確認ダイアログの「OK」</text:span><text:span text:style-name="T26">を押下する。</text:span><text:span text:style-name="T27">　</text:span></text:p>
            <text:p/>
            <text:p><text:span text:style-name="T7">・入力値</text:span></text:p>
            <text:p><text:span text:style-name="T7">出勤：19　：00</text:span></text:p>
            <text:p><text:span text:style-name="T7">退勤：18　：00</text:span></text:p>
          </table:table-cell>
          <table:covered-table-cell table:number-columns-repeated="22" table:style-name="ce118"/>
          <table:table-cell table:style-name="ce118" office:value-type="string" calcext:value-type="string" table:number-columns-spanned="27" table:number-rows-spanned="1">
            <text:p><text:span text:style-name="T7">出勤が退勤よりも遅い時間のため、勤怠情報直接変更画面のままとなること。</text:span></text:p>
            <text:p><text:span text:style-name="T7">退勤の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38">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80" office:value-type="string" calcext:value-type="string" table:number-columns-spanned="23" table:number-rows-spanned="1">
            <text:p><text:span text:style-name="T7">勤怠情報直接変更画面にて</text:span><text:span text:style-name="T23">出勤、退勤、中抜け時間を以下の内容で入力し</text:span><text:span text:style-name="T24">「更新」ボタン、</text:span><text:span text:style-name="T25">確認ダイアログの「OK」</text:span><text:span text:style-name="T26">を押下する。</text:span><text:span text:style-name="T27">　</text:span></text:p>
            <text:p/>
            <text:p><text:span text:style-name="T7">・入力値</text:span></text:p>
            <text:p><text:span text:style-name="T7">出勤：09　：00</text:span></text:p>
            <text:p><text:span text:style-name="T7">退勤：12　：00</text:span></text:p>
            <text:p><text:span text:style-name="T7">中抜け時間：4時間</text:span></text:p>
          </table:table-cell>
          <table:covered-table-cell table:number-columns-repeated="22" table:style-name="ce118"/>
          <table:table-cell table:style-name="ce192" office:value-type="string" calcext:value-type="string" table:number-columns-spanned="27" table:number-rows-spanned="1">
            <text:p><text:span text:style-name="T29">出勤時間を超える中抜け時間のため、勤怠情報直接変更画面のままとなること。</text:span></text:p>
            <text:p><text:span text:style-name="T29">中抜け時間の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38">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80" office:value-type="string" calcext:value-type="string" table:number-columns-spanned="23" table:number-rows-spanned="1">
            <text:p><text:span text:style-name="T7">勤怠情報直接変更画面にて</text:span><text:span text:style-name="T23">出勤、退勤、備考を以下の内容で入力し</text:span><text:span text:style-name="T24">「更新」ボタン、</text:span><text:span text:style-name="T25">確認ダイアログの「OK」</text:span><text:span text:style-name="T26">を押下する。</text:span><text:span text:style-name="T27">　</text:span></text:p>
            <text:p/>
            <text:p><text:span text:style-name="T7">・入力値</text:span></text:p>
            <text:p><text:span text:style-name="T7">出勤：09　：00</text:span></text:p>
            <text:p><text:span text:style-name="T7">退勤：18　：00</text:span></text:p>
            <text:p><text:span text:style-name="T7">備考：あ×101</text:span></text:p>
          </table:table-cell>
          <table:covered-table-cell table:number-columns-repeated="21" table:style-name="ce121"/>
          <table:covered-table-cell table:style-name="ce124"/>
          <table:table-cell table:style-name="ce193" office:value-type="string" calcext:value-type="string" table:number-columns-spanned="27" table:number-rows-spanned="1">
            <text:p><text:span text:style-name="T7">備考が文字数超過のため、勤怠情報直接変更画面のままとなること。</text:span></text:p>
            <text:p><text:span text:style-name="T7">備考の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3" table:style-name="ta15">
        <office:forms form:automatic-focus="false" form:apply-design-mode="false"/>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7]" office:value-type="string" office:string-value="受講生 試験の実施 結果0点" calcext:value-type="string" table:number-columns-spanned="22" table:number-rows-spanned="1">
            <text:p>受講生 試験の実施 結果0点</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9">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26">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8">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text:span text:style-name="T7">コース詳細画面の上から見て最初にある</text:span>「試験有」ステータスの研修日の「詳細」ボタンを押下。</text:p>
          </table:table-cell>
          <table:covered-table-cell table:number-columns-repeated="22" table:style-name="ce118"/>
          <table:table-cell table:style-name="ce118" office:value-type="string" calcext:value-type="string" table:number-columns-spanned="27" table:number-rows-spanned="1">
            <text:p>セクション詳細画面に遷移する。</text:p>
            <text:p><text:span text:style-name="T7">タイトルに「セクション詳細 | LMS</text:span>」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40">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セクション詳細画面の「本日の試験」エリアの「詳細」ボタンを押下する。</text:p>
          </table:table-cell>
          <table:covered-table-cell table:number-columns-repeated="22" table:style-name="ce118"/>
          <table:table-cell table:style-name="ce138" office:value-type="string" calcext:value-type="string" table:number-columns-spanned="27" table:number-rows-spanned="1">
            <text:p>試験開始画面に遷移する。</text:p>
            <text:p><text:span text:style-name="T15">タイトルに「</text:span><text:span text:style-name="T16">試験【ITリテラシー①】 | LMS</text:span><text:span text:style-name="T1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27">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38" office:value-type="string" calcext:value-type="string" table:number-columns-spanned="23" table:number-rows-spanned="1">
            <text:p>試験開始画面の「試験を開始する」ボタンを押下する。</text:p>
          </table:table-cell>
          <table:covered-table-cell table:number-columns-repeated="22" table:style-name="ce118"/>
          <table:table-cell table:style-name="ce118" office:value-type="string" calcext:value-type="string" table:number-columns-spanned="27" table:number-rows-spanned="1">
            <text:p>試験問題画面に遷移する。</text:p>
            <text:p><text:span text:style-name="T7">回答選択肢が表示されてること。</text:span></text:p>
            <text:p><text:span text:style-name="T7">タイトルに「ITリテラシー①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27">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office:value-type="string" calcext:value-type="string" table:number-columns-spanned="23" table:number-rows-spanned="1">
            <text:p>試験問題画面の「確認画面へ進む」ボタンを未回答の状態で押下する。</text:p>
          </table:table-cell>
          <table:covered-table-cell table:number-columns-repeated="22" table:style-name="ce118"/>
          <table:table-cell table:style-name="ce118" office:value-type="string" calcext:value-type="string" table:number-columns-spanned="27" table:number-rows-spanned="1">
            <text:p>試験回答確認画面に遷移する。</text:p>
            <text:p>「回答数」が表示されてること。</text:p>
            <text:p><text:span text:style-name="T7">タイトルに「ITリテラシー①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4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office:value-type="string" calcext:value-type="string" table:number-columns-spanned="23" table:number-rows-spanned="1">
            <text:p><text:span text:style-name="T7">試験回答確認画面の「回答を送信する」ボタン、</text:span><text:span text:style-name="T21">確認ダイアログの「OK」</text:span>を押下する。</text:p>
          </table:table-cell>
          <table:covered-table-cell table:number-columns-repeated="22" table:style-name="ce118"/>
          <table:table-cell table:style-name="ce118" office:value-type="string" calcext:value-type="string" table:number-columns-spanned="27" table:number-rows-spanned="1">
            <text:p>試験結果画面に遷移する。</text:p>
            <text:p><text:span text:style-name="T18">試験実施日時を保存する。</text:span></text:p>
            <text:p><text:span text:style-name="T18">「あなたのスコア」が表示されること。</text:span></text:p>
            <text:p><text:span text:style-name="T7">タイトルに「ITリテラシー①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42">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office:value-type="string" calcext:value-type="string" table:number-columns-spanned="23" table:number-rows-spanned="1">
            <text:p>試験結果画面の「戻る」ボタンを押下する。</text:p>
          </table:table-cell>
          <table:covered-table-cell table:number-columns-repeated="22" table:style-name="ce118"/>
          <table:table-cell table:style-name="ce118" office:value-type="string" calcext:value-type="string" table:number-columns-spanned="27" table:number-rows-spanned="1">
            <text:p><text:span text:style-name="T14">試験開始画面に遷移する。</text:span></text:p>
            <text:p><text:span text:style-name="T14">「過去の試験結果」に該当試験の結果が表示され、実施日時が一致すること。</text:span></text:p>
            <text:p><text:span text:style-name="T15">タイトルに「</text:span><text:span text:style-name="T16">試験【ITリテラシー①】 | LMS</text:span><text:span text:style-name="T30">」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4" table:style-name="ta16">
        <office:forms form:automatic-focus="false" form:apply-design-mode="false"/>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8]" office:value-type="string" office:string-value="受講生 試験の実施 結果50点" calcext:value-type="string" table:number-columns-spanned="22" table:number-rows-spanned="1">
            <text:p>受講生 試験の実施 結果50点</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41">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28">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43">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text:span text:style-name="T7">コース詳細画面の上から見て最初にある</text:span>「試験有」ステータスの研修日の「詳細」ボタンを押下。</text:p>
          </table:table-cell>
          <table:covered-table-cell table:number-columns-repeated="22" table:style-name="ce118"/>
          <table:table-cell table:style-name="ce118" office:value-type="string" calcext:value-type="string" table:number-columns-spanned="27" table:number-rows-spanned="1">
            <text:p>セクション詳細画面に遷移する。</text:p>
            <text:p><text:span text:style-name="T7">タイトルに「セクション詳細 | LMS</text:span>」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44">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セクション詳細画面の「本日の試験」エリアの「詳細」ボタンを押下する。</text:p>
          </table:table-cell>
          <table:covered-table-cell table:number-columns-repeated="22" table:style-name="ce118"/>
          <table:table-cell table:style-name="ce138" office:value-type="string" calcext:value-type="string" table:number-columns-spanned="27" table:number-rows-spanned="1">
            <text:p>試験開始画面に遷移する。</text:p>
            <text:p><text:span text:style-name="T15">タイトルに「</text:span><text:span text:style-name="T16">試験【ITリテラシー①】 | LMS</text:span><text:span text:style-name="T1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27">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38" office:value-type="string" calcext:value-type="string" table:number-columns-spanned="23" table:number-rows-spanned="1">
            <text:p>試験開始画面の「試験を開始する」ボタンを押下する。</text:p>
          </table:table-cell>
          <table:covered-table-cell table:number-columns-repeated="22" table:style-name="ce118"/>
          <table:table-cell table:style-name="ce118" office:value-type="string" calcext:value-type="string" table:number-columns-spanned="27" table:number-rows-spanned="1">
            <text:p>試験問題画面に遷移する。</text:p>
            <text:p>回答選択肢が表示されてること。</text:p>
            <text:p><text:span text:style-name="T7">タイトルに「ITリテラシー①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45">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office:value-type="string" calcext:value-type="string" table:number-columns-spanned="23" table:number-rows-spanned="1">
            <text:p>試験問題画面の回答を以下の内容で入力し「確認画面へ進む」ボタンを押下する。</text:p>
            <text:p/>
            <text:p>・入力値（1-6を正答、7-12を誤答）：</text:p>
            <text:p>問1 ：3</text:p>
            <text:p>問2 ：3</text:p>
            <text:p>問3 ：1</text:p>
            <text:p>問4 ：1</text:p>
            <text:p>問5 ：2</text:p>
            <text:p>問6 ：2</text:p>
            <text:p>問7 ：1</text:p>
            <text:p>問8 ：1</text:p>
            <text:p>問9 ：1</text:p>
            <text:p>問10：1</text:p>
            <text:p>問11：1</text:p>
            <text:p>問12：1</text:p>
            <text:p/>
          </table:table-cell>
          <table:covered-table-cell table:number-columns-repeated="22" table:style-name="ce118"/>
          <table:table-cell table:style-name="ce118" office:value-type="string" calcext:value-type="string" table:number-columns-spanned="27" table:number-rows-spanned="1">
            <text:p>試験回答確認画面に遷移する。</text:p>
            <text:p>「回答数」が表示されてること。</text:p>
            <text:p><text:span text:style-name="T7">タイトルに「ITリテラシー①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4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office:value-type="string" calcext:value-type="string" table:number-columns-spanned="23" table:number-rows-spanned="1">
            <text:p><text:span text:style-name="T7">試験回答確認画面の「回答を送信する」ボタン、</text:span><text:span text:style-name="T21">確認ダイアログの「OK」</text:span>を押下する。</text:p>
          </table:table-cell>
          <table:covered-table-cell table:number-columns-repeated="22" table:style-name="ce118"/>
          <table:table-cell table:style-name="ce118" office:value-type="string" calcext:value-type="string" table:number-columns-spanned="27" table:number-rows-spanned="1">
            <text:p>試験結果画面に遷移する。</text:p>
            <text:p><text:span text:style-name="T18">試験実施日時を保存する。</text:span></text:p>
            <text:p><text:span text:style-name="T18">「あなたのスコア」が表示されること。</text:span></text:p>
            <text:p><text:span text:style-name="T7">タイトルに「ITリテラシー①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46">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office:value-type="string" calcext:value-type="string" table:number-columns-spanned="23" table:number-rows-spanned="1">
            <text:p>試験結果画面の「戻る」ボタンを押下する。</text:p>
          </table:table-cell>
          <table:covered-table-cell table:number-columns-repeated="22" table:style-name="ce118"/>
          <table:table-cell table:style-name="ce118" office:value-type="string" calcext:value-type="string" table:number-columns-spanned="27" table:number-rows-spanned="1">
            <text:p><text:span text:style-name="T14">試験開始画面に遷移する。</text:span></text:p>
            <text:p><text:span text:style-name="T14">「過去の試験結果」に該当試験の結果が表示され、実施日時が一致すること。</text:span></text:p>
            <text:p><text:span text:style-name="T15">タイトルに「</text:span><text:span text:style-name="T16">試験【ITリテラシー①】 | LMS</text:span><text:span text:style-name="T30">」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5" table:style-name="ta17">
        <office:forms form:automatic-focus="false" form:apply-design-mode="false"/>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9]" office:value-type="string" office:string-value="受講生 初回ログイン 利用規約に不同意" calcext:value-type="string" table:number-columns-spanned="22" table:number-rows-spanned="1">
            <text:p>受講生 初回ログイン 利用規約に不同意</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のユーザーID・パスワードを入力し、「ログイン」ボタンを押下する。</text:span></text:p>
            <text:p/>
            <text:p><text:span text:style-name="T7">・入力値：</text:span></text:p>
            <text:p><text:span text:style-name="T7">ログインID</text:span><text:span text:style-name="T8">：StudentAA02</text:span></text:p>
            <text:p><text:span text:style-name="T15">パスワード：StudentAA02</text:span></text:p>
          </table:table-cell>
          <table:covered-table-cell table:number-columns-repeated="22" table:style-name="ce118"/>
          <table:table-cell table:style-name="ce118" office:value-type="string" calcext:value-type="string" table:number-columns-spanned="27" table:number-rows-spanned="1">
            <text:p><text:span text:style-name="T7">ログインが成功し、セキュリティ規約</text:span>画面に遷移する。</text:p>
            <text:p><text:span text:style-name="T7">タイトルに「セキュリティ規約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セキュリティ規約画面にて<text:span text:style-name="T18">「同意します」チェックボックスにチェックをせず「次へ」ボタンを押下する。</text:span></text:p>
          </table:table-cell>
          <table:covered-table-cell table:number-columns-repeated="22" table:style-name="ce118"/>
          <table:table-cell table:style-name="ce118" office:value-type="string" calcext:value-type="string" table:number-columns-spanned="27" table:number-rows-spanned="1">
            <text:p><text:span text:style-name="T19">「同意します」チェックボックスが</text:span><text:span text:style-name="T20">未入力のため、セキュリティ規約画面のままとなること。</text:span></text:p>
            <text:p><text:span text:style-name="T7">「セキュリティ規約への同意は必須です。」とエラーメッセージが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6" table:style-name="ta18">
        <office:forms form:automatic-focus="false" form:apply-design-mode="false"/>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20]" office:value-type="string" office:string-value="受講生 初回ログイン パスワード変更 入力チェック" calcext:value-type="string" table:number-columns-spanned="22" table:number-rows-spanned="1">
            <text:p>受講生 初回ログイン パスワード変更 入力チェック</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47">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48">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のユーザーID・パスワードを入力し、「ログイン」ボタンを押下する。</text:span></text:p>
            <text:p/>
            <text:p><text:span text:style-name="T7">・入力値：</text:span></text:p>
            <text:p><text:span text:style-name="T7">ログインID</text:span><text:span text:style-name="T8">：StudentAA02</text:span></text:p>
            <text:p><text:span text:style-name="T15">パスワード：StudentAA02</text:span></text:p>
          </table:table-cell>
          <table:covered-table-cell table:number-columns-repeated="22" table:style-name="ce118"/>
          <table:table-cell table:style-name="ce118" office:value-type="string" calcext:value-type="string" table:number-columns-spanned="27" table:number-rows-spanned="1">
            <text:p><text:span text:style-name="T7">ログインが成功し、セキュリティ規約</text:span>画面に遷移する。</text:p>
            <text:p><text:span text:style-name="T7">タイトルに「セキュリティ規約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49">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text:span text:style-name="T7">セキュリティ規約画面にて</text:span><text:span text:style-name="T31">「同意します」チェックボックスにチェックをし「次へ」ボタンを押下する。</text:span></text:p>
          </table:table-cell>
          <table:covered-table-cell table:number-columns-repeated="22" table:style-name="ce118"/>
          <table:table-cell table:style-name="ce118" office:value-type="string" calcext:value-type="string" table:number-columns-spanned="27" table:number-rows-spanned="1">
            <text:p><text:span text:style-name="T7">パスワード変更画面に遷移する。</text:span></text:p>
            <text:p><text:span text:style-name="T7">タイトルに「パスワード変更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50">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パスワード変更画面にて以下の内容を入力し「変更」ボタン、確認モーダル「変更」ボタンを押下する。</text:p>
            <text:p/>
            <text:p>・入力値：</text:p>
            <text:p>現在のパスワード：空欄</text:p>
            <text:p>新しいパスワード：空欄</text:p>
            <text:p>確認パスワード　：空欄</text:p>
          </table:table-cell>
          <table:covered-table-cell table:number-columns-repeated="22" table:style-name="ce118"/>
          <table:table-cell table:style-name="ce118" office:value-type="string" calcext:value-type="string" table:number-columns-spanned="27" table:number-rows-spanned="1">
            <text:p><text:span text:style-name="T7">未入力のため、パスワード変更画面のままとなること。</text:span></text:p>
            <text:p><text:span text:style-name="T7">現在のパスワード、新しいパスワード、確認パスワードの入力欄がエラー表示にな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5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text:span text:style-name="T7">パスワード変更画面にて以下の内容を入力し「変更」ボタン、確認モーダル「変更」ボタン</text:span>を押下する。</text:p>
            <text:p/>
            <text:p>・入力値：</text:p>
            <text:p><text:span text:style-name="T7">現在のパスワード：</text:span><text:span text:style-name="T8">StudentAA02</text:span></text:p>
            <text:p><text:span text:style-name="T7">新しいパスワード：</text:span><text:span text:style-name="T8">StudentBB022222222222</text:span></text:p>
            <text:p><text:span text:style-name="T7">確認パスワード　：</text:span><text:span text:style-name="T8">StudentBB022222222222</text:span></text:p>
          </table:table-cell>
          <table:covered-table-cell table:number-columns-repeated="22" table:style-name="ce118"/>
          <table:table-cell table:style-name="ce118" office:value-type="string" calcext:value-type="string" table:number-columns-spanned="27" table:number-rows-spanned="1">
            <text:p><text:span text:style-name="T7">文字数超過のため、パスワード変更画面のままとなること。</text:span></text:p>
            <text:p><text:span text:style-name="T7">新しいパスワードの入力欄がエラー表示にな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5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office:value-type="string" calcext:value-type="string" table:number-columns-spanned="23" table:number-rows-spanned="1">
            <text:p><text:span text:style-name="T7">パスワード変更画面にて以下の内容を入力し「変更」ボタン、確認モーダル「変更」ボタン</text:span>を押下する。</text:p>
            <text:p/>
            <text:p>・入力値：</text:p>
            <text:p><text:span text:style-name="T7">現在のパスワード：</text:span><text:span text:style-name="T8">StudentAA02</text:span></text:p>
            <text:p><text:span text:style-name="T7">新しいパスワード：s</text:span><text:span text:style-name="T8">tudentbb02</text:span></text:p>
            <text:p><text:span text:style-name="T7">確認パスワード　：s</text:span><text:span text:style-name="T8">tudentbb02</text:span></text:p>
          </table:table-cell>
          <table:covered-table-cell table:number-columns-repeated="22" table:style-name="ce118"/>
          <table:table-cell table:style-name="ce118" office:value-type="string" calcext:value-type="string" table:number-columns-spanned="27" table:number-rows-spanned="1">
            <text:p><text:span text:style-name="T7">形式が異なるため、パスワード変更画面のままとなること。</text:span></text:p>
            <text:p><text:span text:style-name="T7">新しいパスワードの入力欄がエラー表示にな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5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office:value-type="string" calcext:value-type="string" table:number-columns-spanned="23" table:number-rows-spanned="1">
            <text:p><text:span text:style-name="T7">パスワード変更画面にて以下の内容を入力し「変更」ボタン、確認モーダル「変更」ボタン</text:span>を押下する。</text:p>
            <text:p/>
            <text:p>・入力値：</text:p>
            <text:p><text:span text:style-name="T7">現在のパスワード：</text:span><text:span text:style-name="T8">StudentAA02</text:span></text:p>
            <text:p><text:span text:style-name="T7">新しいパスワード：</text:span><text:span text:style-name="T8">StudentBB02</text:span></text:p>
            <text:p><text:span text:style-name="T7">確認パスワード　：</text:span><text:span text:style-name="T8">StudentCC02</text:span></text:p>
          </table:table-cell>
          <table:covered-table-cell table:number-columns-repeated="22" table:style-name="ce118"/>
          <table:table-cell table:style-name="ce118" office:value-type="string" calcext:value-type="string" table:number-columns-spanned="27" table:number-rows-spanned="1">
            <text:p><text:span text:style-name="T7">新しいパスワードと確認パスワードが異なるため、パスワード変更画面のままとなること。</text:span></text:p>
            <text:p><text:span text:style-name="T7">新しいパスワードの入力欄がエラー表示にな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7" table:style-name="ta19">
        <office:forms form:automatic-focus="false" form:apply-design-mode="false"/>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21]" office:value-type="string" office:string-value="受講生 初回ログイン 正常系" calcext:value-type="string" table:number-columns-spanned="22" table:number-rows-spanned="1">
            <text:p>受講生 初回ログイン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41">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28">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のユーザーID・パスワードを入力し、「ログイン」ボタンを押下する。</text:span></text:p>
            <text:p/>
            <text:p><text:span text:style-name="T7">・入力値：</text:span></text:p>
            <text:p><text:span text:style-name="T7">ログインID</text:span><text:span text:style-name="T8">：StudentAA02</text:span></text:p>
            <text:p><text:span text:style-name="T15">パスワード：StudentAA02</text:span></text:p>
          </table:table-cell>
          <table:covered-table-cell table:number-columns-repeated="22" table:style-name="ce118"/>
          <table:table-cell table:style-name="ce118" office:value-type="string" calcext:value-type="string" table:number-columns-spanned="27" table:number-rows-spanned="1">
            <text:p><text:span text:style-name="T7">ログインが成功し、セキュリティ規約</text:span>画面に遷移する。</text:p>
            <text:p><text:span text:style-name="T7">タイトルに「セキュリティ規約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43">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text:span text:style-name="T7">セキュリティ規約画面にて</text:span><text:span text:style-name="T31">「同意します」チェックボックスにチェックをし「次へ」ボタンを押下する。</text:span></text:p>
          </table:table-cell>
          <table:covered-table-cell table:number-columns-repeated="22" table:style-name="ce118"/>
          <table:table-cell table:style-name="ce118" office:value-type="string" calcext:value-type="string" table:number-columns-spanned="27" table:number-rows-spanned="1">
            <text:p><text:span text:style-name="T7">パスワード変更画面に遷移する。</text:span></text:p>
            <text:p><text:span text:style-name="T7">タイトルに「パスワード変更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5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パスワード変更画面にて以下の内容を入力し「変更」ボタン、確認モーダル「変更」ボタンを押下する。</text:p>
            <text:p/>
            <text:p>・入力値：</text:p>
            <text:p>現在のパスワード：<text:span text:style-name="T32">StudentAA02</text:span></text:p>
            <text:p><text:span text:style-name="T7">新しいパスワード：</text:span><text:span text:style-name="T8">StudentBB02</text:span></text:p>
            <text:p><text:span text:style-name="T7">確認パスワード　：</text:span><text:span text:style-name="T8">StudentBB02</text:span></text:p>
          </table:table-cell>
          <table:covered-table-cell table:number-columns-repeated="22" table:style-name="ce118"/>
          <table:table-cell table:style-name="ce118" office:value-type="string" calcext:value-type="string" table:number-columns-spanned="27" table:number-rows-spanned="1">
            <text:p><text:span text:style-name="T7">パスワード変更が成功し、コース詳細画面に遷移する。</text:span></text:p>
            <text:p><text:span text:style-name="T7">タイトルに「コース詳細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number:number-style style:name="N0">
      <number:number number:min-integer-digits="1"/>
    </number:number-style>
    <number:number-style style:name="N113P0" style:volatile="true">
      <number:text>¥</number:text>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5P0" style:volatile="true">
      <number:text>$</number:text>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6P0" style:volatile="true">
      <number:text>$</number:text>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number:text>
      <style:map style:condition="value()&gt;=0" style:apply-style-name="N116P0"/>
    </number:number-style>
    <number:number-style style:name="N118P0" style:volatile="true">
      <number:text>¥</number:text>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20P0" style:volatile="true">
      <number:text>$</number:text>
      <number:number number:decimal-places="2" number:min-decimal-places="2" number:min-integer-digits="1" number:grouping="true"/>
      <number:text> </number:text>
    </number:number-style>
    <number:number-style style:name="N120">
      <style:text-properties fo:color="#ff0000"/>
      <number:text>($</number:text>
      <number:number number:decimal-places="2" number:min-decimal-places="2" number:min-integer-digits="1" number:grouping="true"/>
      <number:text>)</number:text>
      <style:map style:condition="value()&gt;=0" style:apply-style-name="N120P0"/>
    </number:number-style>
    <number:number-style style:name="N121P0" style:volatile="true">
      <number:text>$</number:text>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number-style style:name="N122P0" style:volatile="true">
      <number:text>¥</number:text>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text>¥</number:text>
      <number:number number:decimal-places="2" number:min-decimal-places="2" number:min-integer-digits="1" number:grouping="true"/>
    </number:number-style>
    <number:number-style style:name="N123">
      <style:text-properties fo:color="#ff0000"/>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 </number:text>
      <number:fill-character> </number:fill-character>
      <number:text>-</number:text>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 ¥</number:text>
      <number:fill-character> </number:fill-character>
      <number:text>-</number:text>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 </number:text>
      <number:fill-character> </number:fill-character>
      <number:text>-</number:text>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 ¥</number:text>
      <number:fill-character> </number:fill-character>
      <number:text>-</number:text>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 number:language="ja" number:country="JP">€</number:currency-symbol>
      <number:text> </number:text>
      <number:number number:decimal-places="2" number:min-decimal-places="2" number:min-integer-digits="1" number:grouping="true"/>
      <number:text> </number:text>
    </number:currency-style>
    <number:currency-style style:name="N155">
      <style:text-properties fo:color="#ff0000"/>
      <number:text>(</number:text>
      <number:currency-symbol number:language="ja" number:country="JP">€</number:currency-symbol>
      <number:text> </number:text>
      <number:number number:decimal-places="2" number:min-decimal-places="2" number:min-integer-digits="1" number:grouping="true"/>
      <number:text>)</number:text>
      <style:map style:condition="value()&gt;=0" style:apply-style-name="N155P0"/>
    </number:currency-style>
    <number:number-style style:name="N156">
      <number:number number:decimal-places="0" number:min-decimal-places="0" number:min-integer-digits="1"/>
      <number:text>9</number:text>
    </number:number-style>
    <number:number-style style:name="N157">
      <number:number number:decimal-places="0" number:min-decimal-places="0" number:min-integer-digits="2"/>
    </number:number-style>
    <number:date-style style:name="N10112" number:language="ja" number:country="JP">
      <number:year number:style="long"/>
      <number:text>/</number:text>
      <number:month/>
      <number:text>/</number:text>
      <number:day/>
    </number:date-style>
    <number:date-style style:name="N10113" number:language="ja" number:country="JP">
      <number:day/>
      <number:text>-</number:text>
      <number:month number:textual="true"/>
      <number:text>-</number:text>
      <number:year/>
    </number:date-style>
    <number:date-style style:name="N10114" number:language="ja" number:country="JP">
      <number:day/>
      <number:text>-</number:text>
      <number:month number:textual="true"/>
    </number:date-style>
    <number:date-style style:name="N10115" number:language="ja" number:country="JP">
      <number:month number:textual="true"/>
      <number:text>-</number:text>
      <number:year/>
    </number:date-style>
    <number:time-style style:name="N10116" number:language="ja" number:country="JP">
      <number:hours/>
      <number:text>:</number:text>
      <number:minutes number:style="long"/>
      <number:text> </number:text>
      <number:am-pm/>
    </number:time-style>
    <number:time-style style:name="N10117" number:language="ja" number:country="JP">
      <number:hours/>
      <number:text>:</number:text>
      <number:minutes number:style="long"/>
      <number:text>:</number:text>
      <number:seconds number:style="long"/>
      <number:text> </number:text>
      <number:am-pm/>
    </number:time-style>
    <number:time-style style:name="N10118" number:language="ja" number:country="JP">
      <number:hours/>
      <number:text>:</number:text>
      <number:minutes number:style="long"/>
      <number:text>:</number:text>
      <number:seconds number:style="long"/>
    </number:time-style>
    <number:date-style style:name="N10119" number:language="ja" number:country="JP">
      <number:month/>
      <number:text>/</number:text>
      <number:day/>
      <number:text>/</number:text>
      <number:year/>
    </number:date-style>
    <number:date-style style:name="N10120" number:language="ja" number:country="JP">
      <number:year number:style="long"/>
      <number:text>年</number:text>
      <number:month/>
      <number:text>月</number:text>
    </number:date-style>
    <number:number-style style:name="N10122P0" style:volatile="true" number:language="ja" number:country="JP">
      <number:text>¥</number:text>
      <number:number number:decimal-places="0" number:min-decimal-places="0" number:min-integer-digits="1" number:grouping="true"/>
    </number:number-style>
    <number:number-style style:name="N10122" number:language="ja" number:country="JP">
      <number:text>-¥</number:text>
      <number:number number:decimal-places="0" number:min-decimal-places="0" number:min-integer-digits="1" number:grouping="true"/>
      <style:map style:condition="value()&gt;=0" style:apply-style-name="N10122P0"/>
    </number:number-style>
    <number:number-style style:name="N10123P0" style:volatile="true" number:language="ja" number:country="JP">
      <number:text>¥</number:text>
      <number:number number:decimal-places="0" number:min-decimal-places="0" number:min-integer-digits="1" number:grouping="true"/>
    </number:number-style>
    <number:number-style style:name="N10123" number:language="ja" number:country="JP">
      <style:text-properties fo:color="#ff0000"/>
      <number:text>-¥</number:text>
      <number:number number:decimal-places="0" number:min-decimal-places="0" number:min-integer-digits="1" number:grouping="true"/>
      <style:map style:condition="value()&gt;=0" style:apply-style-name="N10123P0"/>
    </number:number-style>
    <number:number-style style:name="N10125P0" style:volatile="true" number:language="ja" number:country="JP">
      <number:text>¥</number:text>
      <number:number number:decimal-places="2" number:min-decimal-places="2" number:min-integer-digits="1" number:grouping="true"/>
    </number:number-style>
    <number:number-style style:name="N10125" number:language="ja" number:country="JP">
      <number:text>-¥</number:text>
      <number:number number:decimal-places="2" number:min-decimal-places="2" number:min-integer-digits="1" number:grouping="true"/>
      <style:map style:condition="value()&gt;=0" style:apply-style-name="N10125P0"/>
    </number:number-style>
    <number:number-style style:name="N10126P0" style:volatile="true" number:language="ja" number:country="JP">
      <number:text>¥</number:text>
      <number:number number:decimal-places="2" number:min-decimal-places="2" number:min-integer-digits="1" number:grouping="true"/>
    </number:number-style>
    <number:number-style style:name="N10126" number:language="ja" number:country="JP">
      <style:text-properties fo:color="#ff0000"/>
      <number:text>-¥</number:text>
      <number:number number:decimal-places="2" number:min-decimal-places="2" number:min-integer-digits="1" number:grouping="true"/>
      <style:map style:condition="value()&gt;=0" style:apply-style-name="N10126P0"/>
    </number:number-style>
    <number:date-style style:name="N10128P0" style:volatile="true" number:language="ja" number:country="JP">
      <number:era number:calendar="gengou"/>
      <number:year number:calendar="gengou"/>
      <number:text>年</number:text>
      <number:month number:calendar="gengou"/>
      <number:text>月</number:text>
      <number:day number:calendar="gengou"/>
      <number:text>日</number:text>
    </number:date-style>
    <number:text-style style:name="N10128" number:language="ja" number:country="JP">
      <number:text-content/>
      <style:map style:condition="value()&lt;=1.7976931348623157E+308" style:apply-style-name="N10128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eading_20_1" style:display-name="Excel Built-in Heading 1" style:family="table-cell" style:parent-style-name="Default" style:data-style-name="N0">
      <style:table-cell-properties style:glyph-orientation-vertical="0" fo:border-bottom="2.49pt solid #4f81bd"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1f497d" style:text-outline="false" style:text-line-through-style="none" style:text-line-through-type="none" style:font-name="ＭＳ Ｐゴシック" fo:font-family="'ＭＳ Ｐゴシック'" style:font-family-generic="modern" style:font-pitch="fixed" fo:font-size="15pt" fo:font-style="normal" fo:text-shadow="none" style:text-underline-style="none" fo:font-weight="bold" style:font-name-asian="ＭＳ Ｐゴシック" style:font-family-asian="'ＭＳ Ｐゴシック'" style:font-family-generic-asian="modern" style:font-pitch-asian="fixed" style:font-size-asian="15pt" style:font-style-asian="normal" style:font-weight-asian="bold" style:font-size-complex="15pt" style:font-style-complex="normal" style:font-weight-complex="bol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標準_20_2_20_8" style:display-name="標準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1pt" fo:font-style="normal" fo:text-shadow="none" style:text-underline-style="none" fo:font-weight="normal" style:font-name-asian="ＭＳ Ｐゴシック" style:font-family-asian="'ＭＳ Ｐゴシック'" style:font-family-generic-asian="modern" style:font-pitch-asian="fixed"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ＭＳ Ｐゴシック" fo:font-family="'ＭＳ Ｐゴシック'" style:font-family-generic="modern" style:font-pitch="fixed" fo:font-size="10pt" fo:font-style="normal" fo:text-shadow="none" style:text-underline-style="solid" style:text-underline-width="auto" style:text-underline-color="font-color"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fo:page-width="29.7cm" fo:page-height="21.001cm" style:num-format="1" style:print-orientation="landscape" fo:margin-top="0.991cm" fo:margin-bottom="0.991cm" fo:margin-left="0.991cm" fo:margin-right="0.991cm" style:first-page-number="continue" style:scale-to-X="1" style:scale-to-Y="1" style:writing-mode="lr-tb"/>
      <style:header-style>
        <style:header-footer-properties fo:min-height="0.75cm" fo:margin-left="0.908cm" fo:margin-right="0.908cm" fo:margin-bottom="0cm"/>
      </style:header-style>
      <style:footer-style>
        <style:header-footer-properties fo:min-height="0.75cm" fo:margin-left="0.908cm" fo:margin-right="0.908cm" fo:margin-top="0cm"/>
      </style:footer-style>
    </style:page-layout>
  </office:automatic-styles>
  <office:master-styles>
    <style:master-page style:name="PageStyle_5f_表紙" style:display-name="PageStyle_表紙"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一覧" style:display-name="PageStyle_ケース一覧"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1" style:display-name="PageStyle_ケース0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2" style:display-name="PageStyle_ケース0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3" style:display-name="PageStyle_ケース0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4" style:display-name="PageStyle_ケース0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5" style:display-name="PageStyle_ケース0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6" style:display-name="PageStyle_ケース0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7" style:display-name="PageStyle_ケース07"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8" style:display-name="PageStyle_ケース08"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9" style:display-name="PageStyle_ケース09"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0" style:display-name="PageStyle_ケース10"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1" style:display-name="PageStyle_ケース1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2" style:display-name="PageStyle_ケース1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3" style:display-name="PageStyle_ケース1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4" style:display-name="PageStyle_ケース1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5" style:display-name="PageStyle_ケース1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6" style:display-name="PageStyle_ケース1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7" style:display-name="PageStyle_ケース17"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6-24T13:10:40.758000000</dc:date>
    <meta:print-date>2025-02-21T15:24:43</meta:print-date>
    <meta:editing-duration>P1DT10H43M16S</meta:editing-duration>
    <meta:editing-cycles>48</meta:editing-cycles>
    <meta:generator>LibreOffice/7.4.3.2$Windows_X86_64 LibreOffice_project/1048a8393ae2eeec98dff31b5c133c5f1d08b890</meta:generator>
    <meta:document-statistic meta:table-count="19" meta:cell-count="607" meta:object-count="0"/>
  </office:meta>
</office:document-meta>
</file>