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02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3.041cm" fo:break-before="auto" style:use-optimal-row-height="false"/>
    </style:style>
    <style:style style:name="ro22" style:family="table-row">
      <style:table-row-properties style:row-height="0.725cm" fo:break-before="auto" style:use-optimal-row-height="false"/>
    </style:style>
    <style:style style:name="ro23" style:family="table-row">
      <style:table-row-properties style:row-height="2.018cm" fo:break-before="auto" style:use-optimal-row-height="true"/>
    </style:style>
    <style:style style:name="ro24" style:family="table-row">
      <style:table-row-properties style:row-height="1.381cm" fo:break-before="auto" style:use-optimal-row-height="true"/>
    </style:style>
    <style:style style:name="ro25" style:family="table-row">
      <style:table-row-properties style:row-height="2.039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2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標準_20_2_20_8">
      <style:text-properties fo:language="en" fo:country="US" style:text-underline-mode="continuous" style:text-overline-mode="continuous" style:text-line-through-mode="continuous" style:language-asian="ja" style:country-asian="JP" style:font-name-complex="Tahoma" style:language-complex="hi" style:country-complex="IN" style:text-emphasize="none" style:font-relief="none" style:text-overline-style="none" style:text-overline-color="font-color"/>
    </style:style>
    <style:style style:name="ce68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ＭＳ ゴシック" fo:font-weight="normal" style:font-name-asian="ＭＳ ゴシック" style:font-weight-asian="normal" style:font-weight-complex="normal"/>
    </style:style>
    <style:style style:name="T6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25"/>
        <table:table-column table:style-name="co2" table:number-columns-repeated="2" table:default-cell-style-name="ce125"/>
        <table:table-column table:style-name="co3" table:default-cell-style-name="ce125"/>
        <table:table-column table:style-name="co4" table:default-cell-style-name="ce133"/>
        <table:table-column table:style-name="co5" table:number-columns-repeated="252" table:default-cell-style-name="ce133"/>
        <table:table-column table:style-name="co5" table:number-columns-repeated="16127" table:default-cell-style-name="Default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>
            <text:p>関係者外秘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/>
          <table:table-cell table:style-name="ce127" office:value-type="string" calcext:value-type="string">
            <text:p>LMS学習管理システム</text:p>
          </table:table-cell>
          <table:table-cell table:number-columns-repeated="16382"/>
        </table:table-row>
        <table:table-row table:style-name="ro4">
          <table:table-cell/>
          <table:table-cell table:style-name="ce127" office:value-type="string" calcext:value-type="string">
            <text:p>結合テスト仕様書</text:p>
          </table:table-cell>
          <table:table-cell table:number-columns-repeated="16382"/>
        </table:table-row>
        <table:table-row table:style-name="ro1" table:number-rows-repeated="9">
          <table:table-cell table:number-columns-repeated="16384"/>
        </table:table-row>
        <table:table-row table:style-name="ro5">
          <table:table-cell/>
          <table:table-cell table:style-name="ce128" office:value-type="string" calcext:value-type="string">
            <text:p>更新履歴</text:p>
          </table:table-cell>
          <table:table-cell table:style-name="ce128" table:number-columns-repeated="2"/>
          <table:table-cell table:number-columns-repeated="16380"/>
        </table:table-row>
        <table:table-row table:style-name="ro6">
          <table:table-cell/>
          <table:table-cell table:style-name="ce129" office:value-type="string" calcext:value-type="string">
            <text:p>年月日</text:p>
          </table:table-cell>
          <table:table-cell table:style-name="ce129" office:value-type="string" calcext:value-type="string">
            <text:p>担当者</text:p>
          </table:table-cell>
          <table:table-cell table:style-name="ce129" office:value-type="string" calcext:value-type="string">
            <text:p>内容</text:p>
          </table:table-cell>
          <table:table-cell table:number-columns-repeated="16380"/>
        </table:table-row>
        <table:table-row table:style-name="ro6">
          <table:table-cell/>
          <table:table-cell table:style-name="ce130" office:value-type="date" office:date-value="2026-06-18" calcext:value-type="date">
            <text:p>2026/06/18</text:p>
          </table:table-cell>
          <table:table-cell table:style-name="ce132" office:value-type="string" calcext:value-type="string">
            <text:p>牧野水宥</text:p>
          </table:table-cell>
          <table:table-cell table:style-name="ce132" office:value-type="string" calcext:value-type="string">
            <text:p>ケース01、ケース02編集</text:p>
          </table:table-cell>
          <table:table-cell table:number-columns-repeated="16380"/>
        </table:table-row>
        <table:table-row table:style-name="ro6">
          <table:table-cell/>
          <table:table-cell table:style-name="ce130" office:value-type="date" office:date-value="2026-06-19" calcext:value-type="date">
            <text:p>2026/06/19</text:p>
          </table:table-cell>
          <table:table-cell table:style-name="ce132" office:value-type="string" calcext:value-type="string">
            <text:p>牧野水宥</text:p>
          </table:table-cell>
          <table:table-cell table:style-name="ce132" office:value-type="string" calcext:value-type="string">
            <text:p>ケース03、ケース04編集</text:p>
          </table:table-cell>
          <table:table-cell table:number-columns-repeated="16380"/>
        </table:table-row>
        <table:table-row table:style-name="ro7">
          <table:table-cell/>
          <table:table-cell table:style-name="ce130"/>
          <table:table-cell table:style-name="ce132" table:number-columns-repeated="2"/>
          <table:table-cell table:number-columns-repeated="16380"/>
        </table:table-row>
        <table:table-row table:style-name="ro7" table:number-rows-repeated="5">
          <table:table-cell/>
          <table:table-cell table:style-name="ce128" table:number-columns-repeated="3"/>
          <table:table-cell table:number-columns-repeated="16380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1638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48" table:default-cell-style-name="ce136"/>
        <table:table-column table:style-name="co7" table:default-cell-style-name="ce178"/>
        <table:table-column table:style-name="co6" table:number-columns-repeated="199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137" office:value-type="string" calcext:value-type="string">
            <text:p>テストケース一覧</text:p>
          </table:table-cell>
          <table:table-cell table:style-name="ce137"/>
          <table:table-cell table:style-name="ce141"/>
          <table:table-cell table:style-name="ce144" table:number-columns-repeated="5"/>
          <table:table-cell table:style-name="ce135" table:number-columns-repeated="48"/>
          <table:table-cell table:style-name="ce179"/>
          <table:table-cell table:style-name="ce183" table:number-columns-repeated="16326"/>
        </table:table-row>
        <table:table-row table:style-name="ro1">
          <table:table-cell table:number-columns-repeated="54"/>
          <table:table-cell table:style-name="ce176" office:value-type="string" calcext:value-type="string">
            <text:p>※テストケースは正常系と準正常系に限り行う。</text:p>
          </table:table-cell>
          <table:table-cell table:number-columns-repeated="16329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ケース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7"/>
          <table:covered-table-cell table:style-name="ce149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7"/>
          <table:covered-table-cell table:style-name="ce149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7"/>
          <table:covered-table-cell table:style-name="ce149"/>
          <table:table-cell table:number-columns-repeated="2"/>
          <table:table-cell table:style-name="ce180" office:value-type="string" calcext:value-type="string">
            <text:p>難易度</text:p>
          </table:table-cell>
          <table:table-cell table:number-columns-repeated="16326"/>
        </table:table-row>
        <table:table-row table:style-name="ro9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152"/>
          <table:covered-table-cell table:style-name="ce16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153"/>
          <table:covered-table-cell table:style-name="ce17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154"/>
          <table:covered-table-cell table:style-name="ce17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15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6326"/>
        </table:table-row>
        <table:table-row table:style-name="ro10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15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15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2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15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6326"/>
        </table:table-row>
        <table:table-row table:style-name="ro13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5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4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6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A</text:p>
          </table:table-cell>
          <table:table-cell table:number-columns-repeated="16326"/>
        </table:table-row>
        <table:table-row table:style-name="ro15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6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6">
          <table:table-cell/>
          <table:table-cell table:style-name="ce139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6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7">
          <table:table-cell/>
          <table:table-cell table:style-name="ce139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6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8">
          <table:table-cell/>
          <table:table-cell table:style-name="ce139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6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A</text:p>
          </table:table-cell>
          <table:table-cell table:number-columns-repeated="16326"/>
        </table:table-row>
        <table:table-row table:style-name="ro19">
          <table:table-cell/>
          <table:table-cell table:style-name="ce139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6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A</text:p>
          </table:table-cell>
          <table:table-cell table:number-columns-repeated="16326"/>
        </table:table-row>
        <table:table-row table:style-name="ro9">
          <table:table-cell/>
          <table:table-cell table:style-name="ce139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6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6326"/>
        </table:table-row>
        <table:table-row table:style-name="ro20">
          <table:table-cell/>
          <table:table-cell table:style-name="ce139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7"/>
          <table:covered-table-cell table:style-name="ce17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9">
          <table:table-cell/>
          <table:table-cell table:style-name="ce139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68"/>
          <table:covered-table-cell table:style-name="ce17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office:forms form:automatic-focus="false" form:apply-design-mode="false"/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2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58" office:value-type="string" calcext:value-type="string">
            <text:p><text:span text:style-name="T5">トップページURLにアクセスする。</text:span></text:p>
            <text:p><text:span text:style-name="T5"> </text:span><text:span text:style-name="T5"><text:a xlink:href="http://localhost:8080/lms/" xlink:type="simple">http://localhost:8080/lms/</text:a></text:span></text:p>
          </table:table-cell>
          <table:table-cell table:style-name="ce121" table:number-columns-repeated="21"/>
          <table:table-cell table:style-name="ce124"/>
          <table:table-cell table:style-name="ce68" office:value-type="string" calcext:value-type="string" table:number-columns-spanned="27" table:number-rows-spanned="1">
            <text:p>ログイン画面に遷移する。</text:p>
            <text:p><text:span text:style-name="T6">タイトルに「ログイン」と表示されること。</text:span></text:p>
            <text:p/>
            <text:p/>
          </table:table-cell>
          <table:covered-table-cell table:number-columns-repeated="25" table:style-name="ce61"/>
          <table:covered-table-cell table:style-name="ce63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22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61"/>
          <table:covered-table-cell table:style-name="ce63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61"/>
          <table:covered-table-cell table:style-name="ce63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61"/>
          <table:covered-table-cell table:style-name="ce63"/>
          <table:table-cell table:style-name="ce68" table:number-columns-spanned="27" table:number-rows-spanned="1"/>
          <table:covered-table-cell table:number-columns-repeated="25" table:style-name="ce61"/>
          <table:covered-table-cell table:style-name="ce63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61"/>
          <table:covered-table-cell table:style-name="ce63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61"/>
          <table:covered-table-cell table:style-name="ce63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61"/>
          <table:covered-table-cell table:style-name="ce63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61"/>
          <table:covered-table-cell table:style-name="ce63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2" table:style-name="ta4">
        <office:forms form:automatic-focus="false" form:apply-design-mode="false"/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3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58" office:value-type="string" calcext:value-type="string">
            <text:p><text:span text:style-name="T5">トップページURLにアクセスする。</text:span></text:p>
            <text:p><text:span text:style-name="T5"> </text:span><text:span text:style-name="T5"><text:a xlink:href="http://localhost:8080/lms/" xlink:type="simple">http://localhost:8080/lms/</text:a></text:span></text:p>
          </table:table-cell>
          <table:table-cell table:style-name="ce121" table:number-columns-repeated="21"/>
          <table:table-cell table:style-name="ce124"/>
          <table:table-cell table:style-name="ce68" office:value-type="string" calcext:value-type="string" table:number-columns-spanned="27" table:number-rows-spanned="1">
            <text:p>ログイン画面に遷移する。</text:p>
            <text:p><text:span text:style-name="T6">タイトルに「ログイン」と表示されること。</text:span></text:p>
            <text:p/>
            <text:p/>
          </table:table-cell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23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office:value-type="string" calcext:value-type="string" table:number-columns-spanned="23" table:number-rows-spanned="1">
            <text:p>ログイン画面でDBに登録されていないユーザーID・パスワードを入力し、「ログイン」ボタンを押下する。</text:p>
            <text:p/>
            <text:p>入力値：</text:p>
            <text:p>ログインID：Test001</text:p>
            <text:p>パスワード：Test001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画面遷移せず下記のエラーメッセージが表示されていること。</text:p>
            <text:p>・「ログインに失敗しました。」</text:p>
          </table:table-cell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3" table:style-name="ta5">
        <office:forms form:automatic-focus="false" form:apply-design-mode="false"/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24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58" office:value-type="string" calcext:value-type="string">
            <text:p><text:span text:style-name="T5">トップページURLにアクセスする。</text:span></text:p>
            <text:p><text:span text:style-name="T5"> </text:span><text:span text:style-name="T5"><text:a xlink:href="http://localhost:8080/lms/" xlink:type="simple">http://localhost:8080/lms/</text:a></text:span></text:p>
          </table:table-cell>
          <table:table-cell table:style-name="ce121" table:number-columns-repeated="21"/>
          <table:table-cell table:style-name="ce124"/>
          <table:table-cell table:style-name="ce68" office:value-type="string" calcext:value-type="string" table:number-columns-spanned="27" table:number-rows-spanned="1">
            <text:p>ログイン画面に遷移する。</text:p>
            <text:p><text:span text:style-name="T6">タイトルに「ログイン」と表示されること。</text:span></text:p>
            <text:p/>
            <text:p/>
          </table:table-cell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25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office:value-type="string" calcext:value-type="string" table:number-columns-spanned="23" table:number-rows-spanned="1">
            <text:p><text:span text:style-name="T6">ログイン画面で初回ログイン済みユーザーID・パスワードを入力し、「ログイン」ボタンを押下する。</text:span></text:p>
            <text:p><text:span text:style-name="T6"/></text:p>
            <text:p><text:span text:style-name="T6">入力値：</text:span></text:p>
            <text:p><text:span text:style-name="T6">ログインID：StudentAA01</text:span></text:p>
            <text:p><text:span text:style-name="T6">パスワード：StudentBB01</text:span>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ログインが成功し、コース詳細画面に遷移すること。</text:p>
          </table:table-cell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4" table:style-name="ta6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5" table:style-name="ta7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6" table:style-name="ta8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7" table:style-name="ta9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8" table:style-name="ta10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9" table:style-name="ta11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0" table:style-name="ta12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7" table:number-columns-spanned="5" table:number-rows-spanned="1"/>
          <table:covered-table-cell table:number-columns-repeated="4" table:style-name="ce77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</text:span><text:span text:style-name="T1">管理者アカウントでログイン</text:span></text:p>
              <text:p text:style-name="P1"><text:span text:style-name="T1"/></text:p>
              <text:p text:style-name="P1"><text:span text:style-name="T1">②</text:span><text:span text:style-name="T1">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</text:span><text:span text:style-name="T1">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</text:span><text:span text:style-name="T1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1" table:style-name="ta13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7" table:number-columns-spanned="5" table:number-rows-spanned="1"/>
          <table:covered-table-cell table:number-columns-repeated="4" table:style-name="ce77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2" table:style-name="ta14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7" table:number-columns-spanned="5" table:number-rows-spanned="1"/>
          <table:covered-table-cell table:number-columns-repeated="4" table:style-name="ce77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3" table:style-name="ta15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4" table:style-name="ta16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5" table:style-name="ta17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6" table:style-name="ta18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7" table:style-name="ta19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¥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¥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number:text>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19T10:13:30.476000000</dc:date>
    <meta:print-date>2025-02-21T15:24:43</meta:print-date>
    <meta:editing-duration>PT8H46M17S</meta:editing-duration>
    <meta:editing-cycles>8</meta:editing-cycles>
    <meta:generator>LibreOffice/7.4.3.2$Windows_X86_64 LibreOffice_project/1048a8393ae2eeec98dff31b5c133c5f1d08b890</meta:generator>
    <meta:document-statistic meta:table-count="19" meta:cell-count="422" meta:object-count="0"/>
  </office:meta>
</office:document-meta>
</file>